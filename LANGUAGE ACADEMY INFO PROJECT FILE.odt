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STUDENT NAME: DIANA</text:p>
      <text:p text:style-name="P2">LAST NAME: LOUTFI CUCAKOVIC</text:p>
      <text:p text:style-name="P3">COURSE: NETWORK APPLICATION DEVELOPMENT L1</text:p>
      <text:p text:style-name="P4">SUPERVISOR: MARCIN KACPROWICZ UV</text:p>
      <text:p text:style-name="P5">TITLE OF PROJECT: LANGUAGE ACADEMY<text:s/>(PROJECT WORK)</text:p>
      <text:p text:style-name="P6"/>
      <text:p text:style-name="P7"/>
      <text:p text:style-name="P8">THE<text:s/>TWO<text:s/>OF MY LANGUAGE (LINGUA) ACADEMY<text:s/>PROJECT WORKS:</text:p>
      <text:p text:style-name="P9"/>
      <text:p text:style-name="P10">IN THE FILE THERE IS THE STARTUPS FOR THE TWO LANGUAGE ACADEMY PROJECT APPLICATIONS: HERE AND IN GIT HUB FILE</text:p>
      <text:p text:style-name="P11">AND THERE IN MY GITHUB FOLDER THERE IS A LOT OF DOCUMENTATION, PICTURES, PROJECTS, CODES<text:s/>AND START UPS OF THE APPLICATIONS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1:<text:s/><text:a xlink:href="https://localhost:7167/Home/Profile" office:target-frame-name="_top" xlink:show="replace"><text:span text:style-name="Hyperlink">https://localhost:7167/Home/Profile</text:span></text:a><text:s/></text:p>
      <text:p text:style-name="P30"/>
      <text:p text:style-name="P31"><draw:frame draw:style-name="a0" draw:name="drawing" text:anchor-type="as-char" svg:x="0in" svg:y="0in" svg:width="4.64583in" svg:height="2.92048in" style:rel-width="scale" style:rel-height="scale"><draw:image xlink:href="media/image1.png" xlink:type="simple" xlink:show="embed" xlink:actuate="onLoad"/><svg:title/><svg:desc/></draw:frame><draw:frame draw:style-name="a1" draw:name="drawing" text:anchor-type="as-char" svg:x="0in" svg:y="0in" svg:width="4.6557in" svg:height="2.63645in" style:rel-width="scale" style:rel-height="scale"><draw:image xlink:href="media/image2.png" xlink:type="simple" xlink:show="embed" xlink:actuate="onLoad"/><svg:title/><svg:desc/></draw:frame></text:p>
      <text:p text:style-name="P32"><draw:frame draw:style-name="a2" draw:name="drawing" text:anchor-type="as-char" svg:x="0in" svg:y="0in" svg:width="4.69526in" svg:height="2.64108in" style:rel-width="scale" style:rel-height="scale"><draw:image xlink:href="media/image3.png" xlink:type="simple" xlink:show="embed" xlink:actuate="onLoad"/><svg:title/><svg:desc/></draw:frame></text:p>
      <text:p text:style-name="P33"/>
      <text:p text:style-name="P34">2:<text:s/><text:a xlink:href="http://localhost:62906/Default.aspx" office:target-frame-name="_top" xlink:show="replace"><text:span text:style-name="Hyperlink">http://localhost:62906/Default.aspx</text:span></text:a><text:s/></text:p>
      <text:p text:style-name="P35"/>
      <text:p text:style-name="P36"><draw:frame draw:style-name="a3" draw:name="drawing" text:anchor-type="as-char" svg:x="0in" svg:y="0in" svg:width="5.54167in" svg:height="3.41815in" style:rel-width="scale" style:rel-height="scale"><draw:image xlink:href="media/image4.png" xlink:type="simple" xlink:show="embed" xlink:actuate="onLoad"/><svg:title/><svg:desc/></draw:frame><draw:frame draw:style-name="a4" draw:name="drawing" text:anchor-type="as-char" svg:x="0in" svg:y="0in" svg:width="5.5625in" svg:height="3.40625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ana Loutfi Čučaković</meta:initial-creator>
    <dc:creator>Diana Loutfi Čučaković</dc:creator>
    <meta:creation-date>2026-06-18T02:14:00Z</meta:creation-date>
    <dc:date>2026-06-18T02:14:00Z</dc:date>
    <meta:template xlink:href="Normal.dotm" xlink:type="simple"/>
    <meta:editing-cycles>1</meta:editing-cycles>
    <meta:editing-duration>PT0S</meta:editing-duration>
    <meta:document-statistic meta:page-count="1" meta:paragraph-count="1" meta:word-count="101" meta:character-count="680" meta:row-count="4" meta:non-whitespace-character-count="580"/>
  </office:meta>
</office:document-meta>
</file>