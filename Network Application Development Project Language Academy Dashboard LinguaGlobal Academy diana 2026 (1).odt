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weight="bold" style:font-weight-asian="bold" style:font-weight-complex="bold" style:text-position="super 58.3%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style:font-weight-complex="bold" style:text-position="super 58.3%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Apto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align="center"/>
      <style:text-properties style:font-name="Aptos"/>
    </style:style>
    <style:style style:name="P30" style:parent-style-name="Normal" style:family="paragraph">
      <style:paragraph-properties fo:text-align="center"/>
      <style:text-properties style:font-name="Aptos"/>
    </style:style>
    <style:style style:name="P31" style:parent-style-name="Normal" style:family="paragraph">
      <style:paragraph-properties fo:text-align="center"/>
      <style:text-properties style:font-name="Aptos"/>
    </style:style>
    <style:style style:name="P32" style:parent-style-name="Normal" style:family="paragraph">
      <style:paragraph-properties fo:text-align="center"/>
      <style:text-properties style:font-name="Apto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text-align="center"/>
      <style:text-properties style:font-name="Aptos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ListParagraph" style:list-style-name="LFO2" style:family="paragraph"/>
    <style:style style:name="P39" style:parent-style-name="ListParagraph" style:list-style-name="LFO2" style:family="paragraph"/>
    <style:style style:name="P40" style:parent-style-name="ListParagraph" style:list-style-name="LFO2" style:family="paragraph"/>
    <style:style style:name="P41" style:parent-style-name="ListParagraph" style:list-style-name="LFO2" style:family="paragraph"/>
    <style:style style:name="T42" style:parent-style-name="DefaultParagraphFont" style:family="text">
      <style:text-properties style:font-name="Aptos" fo:font-weight="bold" style:font-weight-asian="bold" style:font-weight-complex="bold"/>
    </style:style>
    <style:style style:name="T43" style:parent-style-name="DefaultParagraphFont" style:family="text">
      <style:text-properties style:font-name="Aptos"/>
    </style:style>
    <style:style style:name="P44" style:parent-style-name="ListParagraph" style:list-style-name="LFO2" style:family="paragraph"/>
    <style:style style:name="P45" style:parent-style-name="ListParagraph" style:list-style-name="LFO2" style:family="paragraph"/>
    <style:style style:name="P46" style:parent-style-name="ListParagraph" style:list-style-name="LFO2" style:family="paragraph"/>
    <style:style style:name="P47" style:parent-style-name="ListParagraph" style:list-style-name="LFO2" style:family="paragraph"/>
    <style:style style:name="P48" style:parent-style-name="ListParagraph" style:list-style-name="LFO2" style:family="paragraph"/>
    <style:style style:name="P49" style:parent-style-name="ListParagraph" style:list-style-name="LFO2" style:family="paragraph">
      <style:text-properties style:font-name="Aptos"/>
    </style:style>
    <style:style style:name="P50" style:parent-style-name="ListParagraph" style:list-style-name="LFO2" style:family="paragraph">
      <style:text-properties style:font-name="Aptos"/>
    </style:style>
    <style:style style:name="P51" style:parent-style-name="ListParagraph" style:list-style-name="LFO2" style:family="paragraph">
      <style:text-properties style:font-name="Aptos"/>
    </style:style>
    <style:style style:name="P52" style:parent-style-name="ListParagraph" style:list-style-name="LFO2" style:family="paragraph">
      <style:text-properties style:font-name="Aptos"/>
    </style:style>
    <style:style style:name="P53" style:parent-style-name="ListParagraph" style:list-style-name="LFO2" style:family="paragraph">
      <style:text-properties style:font-name="Aptos"/>
    </style:style>
    <style:style style:name="P54" style:parent-style-name="ListParagraph" style:list-style-name="LFO2" style:family="paragraph">
      <style:text-properties style:font-name="Aptos"/>
    </style:style>
    <style:style style:name="P55" style:parent-style-name="ListParagraph" style:list-style-name="LFO2" style:family="paragraph">
      <style:text-properties style:font-name="Aptos"/>
    </style:style>
    <style:style style:name="P56" style:parent-style-name="ListParagraph" style:list-style-name="LFO2" style:family="paragraph">
      <style:text-properties style:font-name="Aptos"/>
    </style:style>
    <style:style style:name="P57" style:parent-style-name="ListParagraph" style:list-style-name="LFO2" style:family="paragraph">
      <style:text-properties style:font-name="Aptos"/>
    </style:style>
    <style:style style:name="P58" style:parent-style-name="ListParagraph" style:list-style-name="LFO2" style:family="paragraph">
      <style:text-properties style:font-name="Aptos"/>
    </style:style>
    <style:style style:name="P59" style:parent-style-name="ListParagraph" style:list-style-name="LFO2" style:family="paragraph">
      <style:text-properties style:font-name="Aptos"/>
    </style:style>
    <style:style style:name="P60" style:parent-style-name="ListParagraph" style:list-style-name="LFO2" style:family="paragraph">
      <style:text-properties style:font-name="Aptos"/>
    </style:style>
    <style:style style:name="P61" style:parent-style-name="ListParagraph" style:list-style-name="LFO2" style:family="paragraph">
      <style:text-properties style:font-name="Aptos"/>
    </style:style>
    <style:style style:name="P62" style:parent-style-name="Normal" style:family="paragraph">
      <style:text-properties style:font-name="Aptos"/>
    </style:style>
    <style:style style:name="P63" style:parent-style-name="Normal" style:family="paragraph">
      <style:text-properties style:font-name="Aptos"/>
    </style:style>
    <style:style style:name="P64" style:parent-style-name="Normal" style:family="paragraph">
      <style:text-properties style:font-name="Aptos"/>
    </style:style>
    <style:style style:name="P65" style:parent-style-name="Normal" style:family="paragraph">
      <style:text-properties style:font-name="Aptos"/>
    </style:style>
    <style:style style:name="P66" style:parent-style-name="Normal" style:family="paragraph">
      <style:text-properties style:font-name="Aptos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style:font-name="Aptos" style:text-underline-type="single" style:text-underline-style="solid" style:text-underline-width="auto" style:text-underline-mode="continuous"/>
    </style:style>
    <style:style style:name="P68" style:parent-style-name="ListParagraph" style:list-style-name="LFO1" style:family="paragraph">
      <style:text-properties style:font-name="Aptos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style:font-name="Aptos"/>
    </style:style>
    <style:style style:name="P70" style:parent-style-name="Normal" style:family="paragraph">
      <style:text-properties style:font-name="Aptos"/>
    </style:style>
    <style:style style:name="P71" style:parent-style-name="Normal" style:family="paragraph">
      <style:text-properties style:font-name="Aptos"/>
    </style:style>
    <style:style style:name="P72" style:parent-style-name="Normal" style:family="paragraph">
      <style:text-properties style:font-name="Aptos"/>
    </style:style>
    <style:style style:name="P73" style:parent-style-name="Normal" style:family="paragraph">
      <style:text-properties style:font-name="Aptos"/>
    </style:style>
    <style:style style:name="P74" style:parent-style-name="Normal" style:family="paragraph">
      <style:text-properties style:font-name="Aptos"/>
    </style:style>
    <style:style style:name="P75" style:parent-style-name="Normal" style:family="paragraph">
      <style:text-properties style:font-name="Aptos"/>
    </style:style>
    <style:style style:name="P76" style:parent-style-name="Normal" style:family="paragraph">
      <style:text-properties style:font-name="Aptos"/>
    </style:style>
    <style:style style:name="P77" style:parent-style-name="Normal" style:family="paragraph">
      <style:text-properties style:font-name="Aptos"/>
    </style:style>
    <style:style style:name="P78" style:parent-style-name="Normal" style:family="paragraph">
      <style:text-properties style:font-name="Aptos"/>
    </style:style>
    <style:style style:name="P79" style:parent-style-name="Normal" style:family="paragraph">
      <style:text-properties style:font-name="Aptos"/>
    </style:style>
    <style:style style:name="P80" style:parent-style-name="Normal" style:family="paragraph">
      <style:text-properties style:font-name="Aptos"/>
    </style:style>
    <style:style style:name="P81" style:parent-style-name="Normal" style:family="paragraph">
      <style:text-properties style:font-name="Aptos"/>
    </style:style>
    <style:style style:name="P82" style:parent-style-name="Normal" style:family="paragraph">
      <style:text-properties style:font-name="Aptos"/>
    </style:style>
    <style:style style:name="P83" style:parent-style-name="Normal" style:family="paragraph">
      <style:text-properties style:font-name="Aptos"/>
    </style:style>
    <style:style style:name="P84" style:parent-style-name="Normal" style:family="paragraph">
      <style:text-properties style:font-name="Aptos"/>
    </style:style>
    <style:style style:name="P85" style:parent-style-name="Normal" style:family="paragraph">
      <style:text-properties style:font-name="Aptos"/>
    </style:style>
    <style:style style:name="P86" style:parent-style-name="Normal" style:family="paragraph">
      <style:text-properties style:font-name="Aptos"/>
    </style:style>
    <style:style style:name="P87" style:parent-style-name="Normal" style:family="paragraph">
      <style:text-properties style:font-name="Aptos"/>
    </style:style>
    <style:style style:name="P88" style:parent-style-name="Normal" style:family="paragraph">
      <style:text-properties style:font-name="Aptos"/>
    </style:style>
    <style:style style:name="P89" style:parent-style-name="Normal" style:family="paragraph">
      <style:text-properties style:font-name="Aptos"/>
    </style:style>
    <style:style style:name="P90" style:parent-style-name="Normal" style:family="paragraph">
      <style:text-properties style:font-name="Aptos"/>
    </style:style>
    <style:style style:name="P91" style:parent-style-name="Normal" style:family="paragraph">
      <style:text-properties style:font-name="Aptos"/>
    </style:style>
    <style:style style:name="P92" style:parent-style-name="Normal" style:family="paragraph">
      <style:text-properties style:font-name="Aptos"/>
    </style:style>
    <style:style style:name="P93" style:parent-style-name="Normal" style:family="paragraph">
      <style:text-properties style:font-name="Aptos"/>
    </style:style>
    <style:style style:name="P94" style:parent-style-name="Normal" style:family="paragraph">
      <style:text-properties style:font-name="Aptos"/>
    </style:style>
    <style:style style:name="P95" style:parent-style-name="Normal" style:family="paragraph">
      <style:text-properties style:font-name="Aptos"/>
    </style:style>
    <style:style style:name="P96" style:parent-style-name="Normal" style:family="paragraph">
      <style:text-properties style:font-name="Aptos"/>
    </style:style>
    <style:style style:name="P97" style:parent-style-name="Normal" style:family="paragraph">
      <style:text-properties style:font-name="Aptos"/>
    </style:style>
    <style:style style:name="P98" style:parent-style-name="Normal" style:family="paragraph">
      <style:text-properties style:font-name="Aptos"/>
    </style:style>
    <style:style style:name="P99" style:parent-style-name="Normal" style:family="paragraph">
      <style:text-properties style:font-name="Aptos"/>
    </style:style>
    <style:style style:name="P100" style:parent-style-name="Normal" style:family="paragraph">
      <style:text-properties style:font-name="Aptos"/>
    </style:style>
    <style:style style:name="P101" style:parent-style-name="Normal" style:family="paragraph">
      <style:text-properties style:font-name="Aptos"/>
    </style:style>
    <style:style style:name="P102" style:parent-style-name="Normal" style:family="paragraph">
      <style:text-properties style:font-name="Aptos"/>
    </style:style>
    <style:style style:name="P103" style:parent-style-name="Normal" style:family="paragraph">
      <style:text-properties style:font-name="Aptos"/>
    </style:style>
    <style:style style:name="P104" style:parent-style-name="Normal" style:family="paragraph">
      <style:text-properties style:font-name="Aptos"/>
    </style:style>
    <style:style style:name="P105" style:parent-style-name="Normal" style:family="paragraph">
      <style:text-properties style:font-name="Aptos"/>
    </style:style>
    <style:style style:name="P106" style:parent-style-name="Normal" style:family="paragraph">
      <style:text-properties style:font-name="Aptos"/>
    </style:style>
    <style:style style:name="P107" style:parent-style-name="Normal" style:family="paragraph">
      <style:text-properties style:font-name="Aptos"/>
    </style:style>
    <style:style style:name="P108" style:parent-style-name="Normal" style:family="paragraph">
      <style:text-properties style:font-name="Aptos"/>
    </style:style>
    <style:style style:name="P109" style:parent-style-name="Normal" style:family="paragraph">
      <style:text-properties style:font-name="Aptos"/>
    </style:style>
    <style:style style:name="P110" style:parent-style-name="Normal" style:family="paragraph">
      <style:text-properties style:font-name="Aptos"/>
    </style:style>
    <style:style style:name="P111" style:parent-style-name="Normal" style:family="paragraph">
      <style:text-properties style:font-name="Aptos"/>
    </style:style>
    <style:style style:name="P112" style:parent-style-name="Normal" style:family="paragraph">
      <style:text-properties style:font-name="Aptos"/>
    </style:style>
    <style:style style:name="P113" style:parent-style-name="Normal" style:family="paragraph">
      <style:text-properties style:font-name="Aptos"/>
    </style:style>
    <style:style style:name="P114" style:parent-style-name="Normal" style:family="paragraph">
      <style:text-properties style:font-name="Aptos"/>
    </style:style>
    <style:style style:name="P115" style:parent-style-name="Normal" style:family="paragraph">
      <style:text-properties style:font-name="Aptos"/>
    </style:style>
    <style:style style:name="P116" style:parent-style-name="Normal" style:family="paragraph">
      <style:text-properties style:font-name="Aptos"/>
    </style:style>
    <style:style style:name="P117" style:parent-style-name="Normal" style:family="paragraph">
      <style:text-properties style:font-name="Aptos"/>
    </style:style>
    <style:style style:name="P118" style:parent-style-name="ListParagraph" style:list-style-name="LFO1" style:family="paragraph">
      <style:text-properties style:font-name="Aptos" style:text-underline-type="single" style:text-underline-style="solid" style:text-underline-width="auto" style:text-underline-mode="continuous"/>
    </style:style>
    <style:style style:name="P119" style:parent-style-name="Normal" style:family="paragraph">
      <style:text-properties style:font-name="Aptos"/>
    </style:style>
    <style:style style:name="P120" style:parent-style-name="Normal" style:family="paragraph">
      <style:text-properties style:font-name="Aptos"/>
    </style:style>
    <style:style style:name="P121" style:parent-style-name="Normal" style:family="paragraph">
      <style:text-properties style:font-name="Aptos"/>
    </style:style>
    <style:style style:name="P122" style:parent-style-name="Normal" style:family="paragraph">
      <style:text-properties style:font-name="Aptos"/>
    </style:style>
    <style:style style:name="P123" style:parent-style-name="Normal" style:family="paragraph">
      <style:text-properties style:font-name="Aptos"/>
    </style:style>
    <style:style style:name="P124" style:parent-style-name="Normal" style:family="paragraph">
      <style:text-properties style:font-name="Aptos"/>
    </style:style>
    <style:style style:name="P125" style:parent-style-name="Normal" style:family="paragraph">
      <style:text-properties style:font-name="Aptos"/>
    </style:style>
    <style:style style:name="P126" style:parent-style-name="Normal" style:family="paragraph">
      <style:text-properties style:font-name="Aptos"/>
    </style:style>
    <style:style style:name="P127" style:parent-style-name="Normal" style:family="paragraph">
      <style:text-properties style:font-name="Aptos"/>
    </style:style>
    <style:style style:name="P128" style:parent-style-name="Normal" style:family="paragraph">
      <style:text-properties style:font-name="Aptos"/>
    </style:style>
    <style:style style:name="P129" style:parent-style-name="Normal" style:family="paragraph">
      <style:text-properties style:font-name="Aptos"/>
    </style:style>
    <style:style style:name="P130" style:parent-style-name="Normal" style:family="paragraph">
      <style:text-properties style:font-name="Aptos"/>
    </style:style>
    <style:style style:name="P131" style:parent-style-name="Normal" style:family="paragraph">
      <style:text-properties style:font-name="Aptos"/>
    </style:style>
    <style:style style:name="P132" style:parent-style-name="Normal" style:family="paragraph">
      <style:text-properties style:font-name="Aptos"/>
    </style:style>
    <style:style style:name="P133" style:parent-style-name="Normal" style:family="paragraph">
      <style:text-properties style:font-name="Aptos"/>
    </style:style>
    <style:style style:name="P134" style:parent-style-name="Normal" style:family="paragraph">
      <style:text-properties style:font-name="Aptos"/>
    </style:style>
    <style:style style:name="P135" style:parent-style-name="Normal" style:family="paragraph">
      <style:text-properties style:font-name="Aptos"/>
    </style:style>
    <style:style style:name="P136" style:parent-style-name="Normal" style:family="paragraph">
      <style:text-properties style:font-name="Aptos"/>
    </style:style>
    <style:style style:name="P137" style:parent-style-name="Normal" style:family="paragraph">
      <style:text-properties style:font-name="Aptos"/>
    </style:style>
    <style:style style:name="P138" style:parent-style-name="Normal" style:family="paragraph">
      <style:text-properties style:font-name="Aptos"/>
    </style:style>
    <style:style style:name="P139" style:parent-style-name="Normal" style:family="paragraph">
      <style:text-properties style:font-name="Aptos"/>
    </style:style>
    <style:style style:name="P140" style:parent-style-name="Normal" style:family="paragraph">
      <style:text-properties style:font-name="Aptos"/>
    </style:style>
    <style:style style:name="P141" style:parent-style-name="Normal" style:family="paragraph">
      <style:text-properties style:font-name="Aptos"/>
    </style:style>
    <style:style style:name="P142" style:parent-style-name="Normal" style:family="paragraph">
      <style:text-properties style:font-name="Aptos"/>
    </style:style>
    <style:style style:name="P143" style:parent-style-name="Normal" style:family="paragraph">
      <style:text-properties style:font-name="Aptos"/>
    </style:style>
    <style:style style:name="P144" style:parent-style-name="Normal" style:family="paragraph">
      <style:text-properties style:font-name="Aptos"/>
    </style:style>
    <style:style style:name="P145" style:parent-style-name="Normal" style:family="paragraph">
      <style:text-properties style:font-name="Aptos"/>
    </style:style>
    <style:style style:name="P146" style:parent-style-name="Normal" style:family="paragraph">
      <style:text-properties style:font-name="Aptos"/>
    </style:style>
    <style:style style:name="P147" style:parent-style-name="Normal" style:family="paragraph">
      <style:text-properties style:font-name="Aptos"/>
    </style:style>
    <style:style style:name="P148" style:parent-style-name="Normal" style:family="paragraph">
      <style:text-properties style:font-name="Aptos"/>
    </style:style>
    <style:style style:name="P149" style:parent-style-name="Normal" style:family="paragraph">
      <style:text-properties style:font-name="Aptos"/>
    </style:style>
    <style:style style:name="P150" style:parent-style-name="Normal" style:family="paragraph">
      <style:text-properties style:font-name="Aptos"/>
    </style:style>
    <style:style style:name="P151" style:parent-style-name="Normal" style:family="paragraph">
      <style:text-properties style:font-name="Aptos"/>
    </style:style>
    <style:style style:name="P152" style:parent-style-name="Normal" style:family="paragraph">
      <style:text-properties style:font-name="Aptos"/>
    </style:style>
    <style:style style:name="P153" style:parent-style-name="Normal" style:family="paragraph">
      <style:text-properties style:font-name="Aptos"/>
    </style:style>
    <style:style style:name="P154" style:parent-style-name="Normal" style:family="paragraph">
      <style:text-properties style:font-name="Aptos"/>
    </style:style>
    <style:style style:name="P155" style:parent-style-name="Normal" style:family="paragraph">
      <style:text-properties style:font-name="Aptos"/>
    </style:style>
    <style:style style:name="P156" style:parent-style-name="Normal" style:family="paragraph">
      <style:text-properties style:font-name="Aptos"/>
    </style:style>
    <style:style style:name="P157" style:parent-style-name="Normal" style:family="paragraph">
      <style:text-properties style:font-name="Aptos"/>
    </style:style>
    <style:style style:name="P158" style:parent-style-name="Normal" style:family="paragraph">
      <style:text-properties style:font-name="Aptos"/>
    </style:style>
    <style:style style:name="P159" style:parent-style-name="Normal" style:family="paragraph">
      <style:text-properties style:font-name="Aptos"/>
    </style:style>
    <style:style style:name="P160" style:parent-style-name="Normal" style:family="paragraph">
      <style:text-properties style:font-name="Aptos"/>
    </style:style>
    <style:style style:name="P161" style:parent-style-name="Normal" style:family="paragraph">
      <style:text-properties style:font-name="Aptos"/>
    </style:style>
    <style:style style:name="P162" style:parent-style-name="Normal" style:family="paragraph">
      <style:text-properties style:font-name="Aptos"/>
    </style:style>
    <style:style style:name="P163" style:parent-style-name="Normal" style:family="paragraph">
      <style:text-properties style:font-name="Aptos"/>
    </style:style>
    <style:style style:name="P164" style:parent-style-name="Normal" style:family="paragraph">
      <style:text-properties style:font-name="Aptos"/>
    </style:style>
    <style:style style:name="P165" style:parent-style-name="Normal" style:family="paragraph">
      <style:text-properties style:font-name="Aptos"/>
    </style:style>
    <style:style style:name="P166" style:parent-style-name="Normal" style:family="paragraph">
      <style:text-properties style:font-name="Aptos"/>
    </style:style>
    <style:style style:name="P167" style:parent-style-name="Normal" style:family="paragraph">
      <style:text-properties style:font-name="Aptos"/>
    </style:style>
    <style:style style:name="P168" style:parent-style-name="Normal" style:family="paragraph">
      <style:text-properties style:font-name="Aptos"/>
    </style:style>
    <style:style style:name="P169" style:parent-style-name="ListParagraph" style:list-style-name="LFO1" style:family="paragraph">
      <style:text-properties style:font-name="Aptos" style:text-underline-type="single" style:text-underline-style="solid" style:text-underline-width="auto" style:text-underline-mode="continuous"/>
    </style:style>
    <style:style style:name="P170" style:parent-style-name="Normal" style:family="paragraph">
      <style:text-properties style:font-name="Aptos" style:text-underline-type="single" style:text-underline-style="solid" style:text-underline-width="auto" style:text-underline-mode="continuous"/>
    </style:style>
    <style:style style:name="P171" style:parent-style-name="Normal" style:family="paragraph">
      <style:text-properties style:font-name="Aptos"/>
    </style:style>
    <style:style style:name="P172" style:parent-style-name="Normal" style:family="paragraph">
      <style:text-properties style:font-name="Aptos"/>
    </style:style>
    <style:style style:name="P173" style:parent-style-name="Normal" style:family="paragraph">
      <style:text-properties style:font-name="Aptos"/>
    </style:style>
    <style:style style:name="P174" style:parent-style-name="Normal" style:family="paragraph">
      <style:text-properties style:font-name="Aptos"/>
    </style:style>
    <style:style style:name="P175" style:parent-style-name="Normal" style:family="paragraph">
      <style:text-properties style:font-name="Aptos"/>
    </style:style>
    <style:style style:name="P176" style:parent-style-name="Normal" style:family="paragraph">
      <style:text-properties style:font-name="Aptos"/>
    </style:style>
    <style:style style:name="P177" style:parent-style-name="Normal" style:family="paragraph">
      <style:text-properties style:font-name="Aptos"/>
    </style:style>
    <style:style style:name="P178" style:parent-style-name="Normal" style:family="paragraph">
      <style:text-properties style:font-name="Aptos"/>
    </style:style>
    <style:style style:name="P179" style:parent-style-name="Normal" style:family="paragraph">
      <style:text-properties style:font-name="Aptos"/>
    </style:style>
    <style:style style:name="P180" style:parent-style-name="Normal" style:family="paragraph">
      <style:text-properties style:font-name="Aptos"/>
    </style:style>
    <style:style style:name="P181" style:parent-style-name="Normal" style:family="paragraph">
      <style:text-properties style:font-name="Aptos"/>
    </style:style>
    <style:style style:name="P182" style:parent-style-name="Normal" style:family="paragraph">
      <style:text-properties style:font-name="Aptos"/>
    </style:style>
    <style:style style:name="P183" style:parent-style-name="Normal" style:family="paragraph">
      <style:text-properties style:font-name="Aptos"/>
    </style:style>
    <style:style style:name="P184" style:parent-style-name="Normal" style:family="paragraph">
      <style:text-properties style:font-name="Aptos"/>
    </style:style>
    <style:style style:name="P185" style:parent-style-name="Normal" style:family="paragraph">
      <style:text-properties style:font-name="Aptos"/>
    </style:style>
    <style:style style:name="P186" style:parent-style-name="Normal" style:family="paragraph">
      <style:text-properties style:font-name="Aptos"/>
    </style:style>
    <style:style style:name="P187" style:parent-style-name="Normal" style:family="paragraph">
      <style:text-properties style:font-name="Aptos"/>
    </style:style>
    <style:style style:name="P188" style:parent-style-name="Normal" style:family="paragraph">
      <style:text-properties style:font-name="Aptos"/>
    </style:style>
    <style:style style:name="P189" style:parent-style-name="Normal" style:family="paragraph">
      <style:text-properties style:font-name="Aptos"/>
    </style:style>
    <style:style style:name="P190" style:parent-style-name="Normal" style:family="paragraph">
      <style:text-properties style:font-name="Aptos"/>
    </style:style>
    <style:style style:name="P191" style:parent-style-name="Normal" style:family="paragraph">
      <style:text-properties style:font-name="Aptos"/>
    </style:style>
    <style:style style:name="P192" style:parent-style-name="Normal" style:family="paragraph">
      <style:text-properties style:font-name="Aptos"/>
    </style:style>
    <style:style style:name="P193" style:parent-style-name="Normal" style:family="paragraph">
      <style:text-properties style:font-name="Aptos"/>
    </style:style>
    <style:style style:name="P194" style:parent-style-name="Normal" style:family="paragraph">
      <style:text-properties style:font-name="Aptos"/>
    </style:style>
    <style:style style:name="P195" style:parent-style-name="Normal" style:family="paragraph">
      <style:text-properties style:font-name="Aptos"/>
    </style:style>
    <style:style style:name="P196" style:parent-style-name="Normal" style:family="paragraph">
      <style:text-properties style:font-name="Aptos"/>
    </style:style>
    <style:style style:name="P197" style:parent-style-name="Normal" style:family="paragraph">
      <style:text-properties style:font-name="Aptos"/>
    </style:style>
    <style:style style:name="P198" style:parent-style-name="Normal" style:family="paragraph">
      <style:text-properties style:font-name="Aptos"/>
    </style:style>
    <style:style style:name="P199" style:parent-style-name="Normal" style:family="paragraph">
      <style:text-properties style:font-name="Aptos"/>
    </style:style>
    <style:style style:name="P200" style:parent-style-name="Normal" style:family="paragraph">
      <style:text-properties style:font-name="Aptos"/>
    </style:style>
    <style:style style:name="P201" style:parent-style-name="Normal" style:family="paragraph">
      <style:text-properties style:font-name="Aptos"/>
    </style:style>
    <style:style style:name="P202" style:parent-style-name="Normal" style:family="paragraph">
      <style:text-properties style:font-name="Aptos"/>
    </style:style>
    <style:style style:name="P203" style:parent-style-name="Normal" style:family="paragraph">
      <style:text-properties style:font-name="Aptos"/>
    </style:style>
    <style:style style:name="P204" style:parent-style-name="Normal" style:family="paragraph">
      <style:text-properties style:font-name="Aptos"/>
    </style:style>
    <style:style style:name="P205" style:parent-style-name="Normal" style:family="paragraph">
      <style:text-properties style:font-name="Aptos"/>
    </style:style>
    <style:style style:name="P206" style:parent-style-name="Normal" style:family="paragraph">
      <style:text-properties style:font-name="Aptos"/>
    </style:style>
    <style:style style:name="P207" style:parent-style-name="Normal" style:family="paragraph">
      <style:text-properties style:font-name="Aptos"/>
    </style:style>
    <style:style style:name="P208" style:parent-style-name="Normal" style:family="paragraph">
      <style:text-properties style:font-name="Aptos"/>
    </style:style>
    <style:style style:name="P209" style:parent-style-name="Normal" style:family="paragraph">
      <style:text-properties style:font-name="Aptos"/>
    </style:style>
    <style:style style:name="P210" style:parent-style-name="Normal" style:family="paragraph">
      <style:text-properties style:font-name="Aptos"/>
    </style:style>
    <style:style style:name="P211" style:parent-style-name="Normal" style:family="paragraph">
      <style:text-properties style:font-name="Aptos"/>
    </style:style>
    <style:style style:name="P212" style:parent-style-name="Normal" style:family="paragraph">
      <style:text-properties style:font-name="Aptos"/>
    </style:style>
    <style:style style:name="P213" style:parent-style-name="Normal" style:family="paragraph">
      <style:text-properties style:font-name="Aptos"/>
    </style:style>
    <style:style style:name="P214" style:parent-style-name="Normal" style:family="paragraph">
      <style:text-properties style:font-name="Aptos"/>
    </style:style>
    <style:style style:name="P215" style:parent-style-name="Normal" style:family="paragraph">
      <style:text-properties style:font-name="Aptos"/>
    </style:style>
    <style:style style:name="P216" style:parent-style-name="Normal" style:family="paragraph">
      <style:text-properties style:font-name="Aptos"/>
    </style:style>
    <style:style style:name="P217" style:parent-style-name="Normal" style:family="paragraph">
      <style:text-properties style:font-name="Aptos"/>
    </style:style>
    <style:style style:name="P218" style:parent-style-name="Normal" style:family="paragraph">
      <style:text-properties style:font-name="Aptos"/>
    </style:style>
    <style:style style:name="P219" style:parent-style-name="Normal" style:family="paragraph">
      <style:text-properties style:font-name="Aptos"/>
    </style:style>
    <style:style style:name="P220" style:parent-style-name="Normal" style:family="paragraph">
      <style:text-properties style:font-name="Aptos"/>
    </style:style>
    <style:style style:name="P221" style:parent-style-name="Normal" style:family="paragraph">
      <style:text-properties style:font-name="Aptos"/>
    </style:style>
    <style:style style:name="P222" style:parent-style-name="Normal" style:family="paragraph">
      <style:text-properties style:font-name="Aptos"/>
    </style:style>
    <style:style style:name="P223" style:parent-style-name="Normal" style:family="paragraph">
      <style:text-properties style:font-name="Aptos"/>
    </style:style>
    <style:style style:name="P224" style:parent-style-name="Normal" style:family="paragraph">
      <style:text-properties style:font-name="Aptos"/>
    </style:style>
    <style:style style:name="P225" style:parent-style-name="Normal" style:family="paragraph">
      <style:text-properties style:font-name="Aptos"/>
    </style:style>
    <style:style style:name="P226" style:parent-style-name="Normal" style:family="paragraph">
      <style:text-properties style:font-name="Aptos"/>
    </style:style>
    <style:style style:name="P227" style:parent-style-name="Normal" style:family="paragraph">
      <style:text-properties style:font-name="Aptos"/>
    </style:style>
    <style:style style:name="P228" style:parent-style-name="Normal" style:family="paragraph">
      <style:text-properties style:font-name="Aptos"/>
    </style:style>
    <style:style style:name="P229" style:parent-style-name="Normal" style:family="paragraph">
      <style:text-properties style:font-name="Aptos"/>
    </style:style>
    <style:style style:name="P230" style:parent-style-name="Normal" style:family="paragraph">
      <style:text-properties style:font-name="Aptos"/>
    </style:style>
    <style:style style:name="P231" style:parent-style-name="Normal" style:family="paragraph">
      <style:text-properties style:font-name="Aptos"/>
    </style:style>
    <style:style style:name="P232" style:parent-style-name="Normal" style:family="paragraph">
      <style:text-properties style:font-name="Aptos"/>
    </style:style>
    <style:style style:name="P233" style:parent-style-name="Normal" style:family="paragraph">
      <style:text-properties style:font-name="Aptos"/>
    </style:style>
    <style:style style:name="P234" style:parent-style-name="Normal" style:family="paragraph">
      <style:text-properties style:font-name="Aptos"/>
    </style:style>
    <style:style style:name="P235" style:parent-style-name="Normal" style:family="paragraph">
      <style:text-properties style:font-name="Aptos"/>
    </style:style>
    <style:style style:name="P236" style:parent-style-name="Normal" style:family="paragraph">
      <style:text-properties style:font-name="Aptos"/>
    </style:style>
    <style:style style:name="P237" style:parent-style-name="Normal" style:family="paragraph">
      <style:text-properties style:font-name="Aptos"/>
    </style:style>
    <style:style style:name="P238" style:parent-style-name="Normal" style:family="paragraph">
      <style:text-properties style:font-name="Aptos"/>
    </style:style>
    <style:style style:name="P239" style:parent-style-name="Normal" style:family="paragraph">
      <style:text-properties style:font-name="Aptos"/>
    </style:style>
    <style:style style:name="P240" style:parent-style-name="Normal" style:family="paragraph">
      <style:text-properties style:font-name="Aptos"/>
    </style:style>
    <style:style style:name="P241" style:parent-style-name="Normal" style:family="paragraph">
      <style:text-properties style:font-name="Aptos"/>
    </style:style>
    <style:style style:name="P242" style:parent-style-name="Normal" style:family="paragraph">
      <style:text-properties style:font-name="Aptos"/>
    </style:style>
    <style:style style:name="P243" style:parent-style-name="Normal" style:family="paragraph">
      <style:text-properties style:font-name="Aptos"/>
    </style:style>
    <style:style style:name="P244" style:parent-style-name="Normal" style:family="paragraph">
      <style:text-properties style:font-name="Aptos"/>
    </style:style>
    <style:style style:name="P245" style:parent-style-name="Normal" style:family="paragraph">
      <style:text-properties style:font-name="Aptos"/>
    </style:style>
    <style:style style:name="P246" style:parent-style-name="Normal" style:family="paragraph">
      <style:text-properties style:font-name="Aptos"/>
    </style:style>
    <style:style style:name="P247" style:parent-style-name="Normal" style:family="paragraph">
      <style:text-properties style:font-name="Aptos"/>
    </style:style>
    <style:style style:name="P248" style:parent-style-name="Normal" style:family="paragraph">
      <style:text-properties style:font-name="Aptos"/>
    </style:style>
    <style:style style:name="P249" style:parent-style-name="Normal" style:family="paragraph">
      <style:text-properties style:font-name="Aptos"/>
    </style:style>
    <style:style style:name="P250" style:parent-style-name="Normal" style:family="paragraph">
      <style:text-properties style:font-name="Aptos"/>
    </style:style>
    <style:style style:name="P251" style:parent-style-name="Normal" style:family="paragraph">
      <style:text-properties style:font-name="Aptos"/>
    </style:style>
    <style:style style:name="P252" style:parent-style-name="Normal" style:family="paragraph">
      <style:text-properties style:font-name="Aptos"/>
    </style:style>
    <style:style style:name="P253" style:parent-style-name="Normal" style:family="paragraph">
      <style:text-properties style:font-name="Aptos"/>
    </style:style>
    <style:style style:name="P254" style:parent-style-name="Normal" style:family="paragraph">
      <style:text-properties style:font-name="Aptos"/>
    </style:style>
    <style:style style:name="P255" style:parent-style-name="Normal" style:family="paragraph">
      <style:text-properties style:font-name="Aptos"/>
    </style:style>
    <style:style style:name="P256" style:parent-style-name="Normal" style:family="paragraph">
      <style:text-properties style:font-name="Aptos"/>
    </style:style>
    <style:style style:name="P257" style:parent-style-name="ListParagraph" style:list-style-name="LFO1" style:family="paragraph">
      <style:text-properties style:font-name="Aptos" style:text-underline-type="single" style:text-underline-style="solid" style:text-underline-width="auto" style:text-underline-mode="continuous"/>
    </style:style>
    <style:style style:name="P258" style:parent-style-name="Normal" style:family="paragraph">
      <style:text-properties style:font-name="Aptos" style:text-underline-type="single" style:text-underline-style="solid" style:text-underline-width="auto" style:text-underline-mode="continuous"/>
    </style:style>
    <style:style style:name="P259" style:parent-style-name="Normal" style:family="paragraph">
      <style:text-properties style:font-name="Aptos"/>
    </style:style>
    <style:style style:name="P260" style:parent-style-name="Normal" style:family="paragraph">
      <style:text-properties style:font-name="Aptos"/>
    </style:style>
    <style:style style:name="P261" style:parent-style-name="Normal" style:family="paragraph">
      <style:text-properties style:font-name="Aptos"/>
    </style:style>
    <style:style style:name="P262" style:parent-style-name="Normal" style:family="paragraph">
      <style:text-properties style:font-name="Aptos"/>
    </style:style>
    <style:style style:name="P263" style:parent-style-name="Normal" style:family="paragraph">
      <style:text-properties style:font-name="Aptos"/>
    </style:style>
    <style:style style:name="P264" style:parent-style-name="Normal" style:family="paragraph">
      <style:text-properties style:font-name="Aptos"/>
    </style:style>
    <style:style style:name="P265" style:parent-style-name="Normal" style:family="paragraph">
      <style:text-properties style:font-name="Aptos"/>
    </style:style>
    <style:style style:name="P266" style:parent-style-name="Normal" style:family="paragraph">
      <style:text-properties style:font-name="Aptos"/>
    </style:style>
    <style:style style:name="P267" style:parent-style-name="Normal" style:family="paragraph">
      <style:text-properties style:font-name="Aptos"/>
    </style:style>
    <style:style style:name="P268" style:parent-style-name="Normal" style:family="paragraph">
      <style:text-properties style:font-name="Aptos"/>
    </style:style>
    <style:style style:name="P269" style:parent-style-name="Normal" style:family="paragraph">
      <style:text-properties style:font-name="Aptos"/>
    </style:style>
    <style:style style:name="P270" style:parent-style-name="Normal" style:family="paragraph">
      <style:text-properties style:font-name="Aptos"/>
    </style:style>
    <style:style style:name="P271" style:parent-style-name="Normal" style:family="paragraph">
      <style:text-properties style:font-name="Aptos"/>
    </style:style>
    <style:style style:name="P272" style:parent-style-name="Normal" style:family="paragraph">
      <style:text-properties style:font-name="Aptos"/>
    </style:style>
    <style:style style:name="P273" style:parent-style-name="Normal" style:family="paragraph">
      <style:text-properties style:font-name="Aptos"/>
    </style:style>
    <style:style style:name="P274" style:parent-style-name="Normal" style:family="paragraph">
      <style:text-properties style:font-name="Aptos"/>
    </style:style>
    <style:style style:name="P275" style:parent-style-name="Normal" style:family="paragraph">
      <style:text-properties style:font-name="Aptos"/>
    </style:style>
    <style:style style:name="P276" style:parent-style-name="Normal" style:family="paragraph">
      <style:text-properties style:font-name="Aptos"/>
    </style:style>
    <style:style style:name="P277" style:parent-style-name="Normal" style:family="paragraph">
      <style:text-properties style:font-name="Aptos"/>
    </style:style>
    <style:style style:name="P278" style:parent-style-name="Normal" style:family="paragraph">
      <style:text-properties style:font-name="Aptos"/>
    </style:style>
    <style:style style:name="P279" style:parent-style-name="Normal" style:family="paragraph">
      <style:text-properties style:font-name="Aptos"/>
    </style:style>
    <style:style style:name="P280" style:parent-style-name="Normal" style:family="paragraph">
      <style:text-properties style:font-name="Aptos"/>
    </style:style>
    <style:style style:name="P281" style:parent-style-name="Normal" style:family="paragraph">
      <style:text-properties style:font-name="Aptos"/>
    </style:style>
    <style:style style:name="P282" style:parent-style-name="Normal" style:family="paragraph">
      <style:text-properties style:font-name="Aptos"/>
    </style:style>
    <style:style style:name="P283" style:parent-style-name="Normal" style:family="paragraph">
      <style:text-properties style:font-name="Aptos"/>
    </style:style>
    <style:style style:name="P284" style:parent-style-name="Normal" style:family="paragraph">
      <style:text-properties style:font-name="Aptos"/>
    </style:style>
    <style:style style:name="P285" style:parent-style-name="Normal" style:family="paragraph">
      <style:text-properties style:font-name="Aptos"/>
    </style:style>
    <style:style style:name="P286" style:parent-style-name="Normal" style:family="paragraph">
      <style:text-properties style:font-name="Aptos"/>
    </style:style>
    <style:style style:name="P287" style:parent-style-name="Normal" style:family="paragraph">
      <style:text-properties style:font-name="Aptos"/>
    </style:style>
    <style:style style:name="P288" style:parent-style-name="Normal" style:family="paragraph">
      <style:text-properties style:font-name="Aptos"/>
    </style:style>
    <style:style style:name="P289" style:parent-style-name="Normal" style:family="paragraph">
      <style:text-properties style:font-name="Aptos"/>
    </style:style>
    <style:style style:name="P290" style:parent-style-name="Normal" style:family="paragraph">
      <style:text-properties style:font-name="Aptos"/>
    </style:style>
    <style:style style:name="P291" style:parent-style-name="Normal" style:family="paragraph">
      <style:text-properties style:font-name="Aptos"/>
    </style:style>
    <style:style style:name="P292" style:parent-style-name="Normal" style:family="paragraph">
      <style:text-properties style:font-name="Aptos"/>
    </style:style>
    <style:style style:name="P293" style:parent-style-name="Normal" style:family="paragraph">
      <style:text-properties style:font-name="Aptos"/>
    </style:style>
    <style:style style:name="P294" style:parent-style-name="Normal" style:family="paragraph">
      <style:text-properties style:font-name="Aptos"/>
    </style:style>
    <style:style style:name="P295" style:parent-style-name="Normal" style:family="paragraph">
      <style:text-properties style:font-name="Aptos"/>
    </style:style>
    <style:style style:name="P296" style:parent-style-name="Normal" style:family="paragraph">
      <style:text-properties style:font-name="Aptos"/>
    </style:style>
    <style:style style:name="P297" style:parent-style-name="Normal" style:family="paragraph">
      <style:text-properties style:font-name="Aptos"/>
    </style:style>
    <style:style style:name="P298" style:parent-style-name="Normal" style:family="paragraph">
      <style:text-properties style:font-name="Aptos"/>
    </style:style>
    <style:style style:name="P299" style:parent-style-name="Normal" style:family="paragraph">
      <style:text-properties style:font-name="Aptos"/>
    </style:style>
    <style:style style:name="P300" style:parent-style-name="Normal" style:family="paragraph">
      <style:text-properties style:font-name="Aptos"/>
    </style:style>
    <style:style style:name="P301" style:parent-style-name="Normal" style:family="paragraph">
      <style:text-properties style:font-name="Aptos"/>
    </style:style>
    <style:style style:name="P302" style:parent-style-name="Normal" style:family="paragraph">
      <style:text-properties style:font-name="Aptos"/>
    </style:style>
    <style:style style:name="P303" style:parent-style-name="Normal" style:family="paragraph">
      <style:text-properties style:font-name="Aptos"/>
    </style:style>
    <style:style style:name="P304" style:parent-style-name="Normal" style:family="paragraph">
      <style:text-properties style:font-name="Aptos"/>
    </style:style>
    <style:style style:name="P305" style:parent-style-name="Normal" style:family="paragraph">
      <style:text-properties style:font-name="Aptos"/>
    </style:style>
    <style:style style:name="P306" style:parent-style-name="Normal" style:family="paragraph">
      <style:text-properties style:font-name="Aptos"/>
    </style:style>
    <style:style style:name="P307" style:parent-style-name="Normal" style:family="paragraph">
      <style:text-properties style:font-name="Aptos"/>
    </style:style>
    <style:style style:name="P308" style:parent-style-name="Normal" style:family="paragraph">
      <style:text-properties style:font-name="Aptos"/>
    </style:style>
    <style:style style:name="P309" style:parent-style-name="Normal" style:family="paragraph">
      <style:text-properties style:font-name="Aptos"/>
    </style:style>
    <style:style style:name="P310" style:parent-style-name="Normal" style:family="paragraph">
      <style:text-properties style:font-name="Aptos"/>
    </style:style>
    <style:style style:name="P311" style:parent-style-name="Normal" style:family="paragraph">
      <style:text-properties style:font-name="Aptos"/>
    </style:style>
    <style:style style:name="P312" style:parent-style-name="Normal" style:family="paragraph">
      <style:text-properties style:font-name="Aptos"/>
    </style:style>
    <style:style style:name="P313" style:parent-style-name="Normal" style:family="paragraph">
      <style:text-properties style:font-name="Aptos"/>
    </style:style>
    <style:style style:name="P314" style:parent-style-name="Normal" style:family="paragraph">
      <style:text-properties style:font-name="Aptos"/>
    </style:style>
    <style:style style:name="P315" style:parent-style-name="Normal" style:family="paragraph">
      <style:text-properties style:font-name="Aptos"/>
    </style:style>
    <style:style style:name="P316" style:parent-style-name="Normal" style:family="paragraph">
      <style:text-properties style:font-name="Aptos"/>
    </style:style>
    <style:style style:name="P317" style:parent-style-name="Normal" style:family="paragraph">
      <style:text-properties style:font-name="Aptos"/>
    </style:style>
    <style:style style:name="P318" style:parent-style-name="Normal" style:family="paragraph">
      <style:text-properties style:font-name="Aptos"/>
    </style:style>
    <style:style style:name="P319" style:parent-style-name="Normal" style:family="paragraph">
      <style:text-properties style:font-name="Aptos"/>
    </style:style>
    <style:style style:name="P320" style:parent-style-name="Normal" style:family="paragraph">
      <style:text-properties style:font-name="Aptos"/>
    </style:style>
    <style:style style:name="P321" style:parent-style-name="Normal" style:family="paragraph">
      <style:text-properties style:font-name="Aptos"/>
    </style:style>
    <style:style style:name="P322" style:parent-style-name="Normal" style:family="paragraph">
      <style:text-properties style:font-name="Aptos"/>
    </style:style>
    <style:style style:name="P323" style:parent-style-name="Normal" style:family="paragraph">
      <style:paragraph-properties fo:text-align="center"/>
      <style:text-properties style:font-name="Aptos"/>
    </style:style>
    <style:style style:name="P324" style:parent-style-name="Normal" style:family="paragraph">
      <style:paragraph-properties fo:text-align="center"/>
      <style:text-properties style:font-name="Aptos"/>
    </style:style>
    <style:style style:name="P325" style:parent-style-name="Normal" style:family="paragraph">
      <style:paragraph-properties fo:text-align="center"/>
    </style:style>
  </office:automatic-styles>
  <office:body>
    <office:text text:use-soft-page-breaks="true">
      <text:p text:style-name="P1"><text:span text:style-name="T2">NAME:<text:s/></text:span><text:span text:style-name="T3">DIANA</text:span></text:p>
      <text:p text:style-name="P4"><text:span text:style-name="T5">SURNAME:<text:s/></text:span><text:span text:style-name="T6">LOUTFI CUCAKOVIC</text:span></text:p>
      <text:p text:style-name="P7"><text:span text:style-name="T8">COURSE:<text:s/></text:span><text:span text:style-name="T9">NETWORK APPLICATION DEVELOPMENT</text:span></text:p>
      <text:p text:style-name="P10"><text:span text:style-name="T11">SUPERVISOR:<text:s/></text:span><text:span text:style-name="T12">MARCIN K</text:span><text:span text:style-name="T13">ACPROWICZ UV</text:span></text:p>
      <text:p text:style-name="P14"><text:span text:style-name="T15">STARTED DATE PROJECT:</text:span><text:span text:style-name="T16">16</text:span><text:span text:style-name="T17">th</text:span><text:span text:style-name="T18"><text:s/>of June<text:s/></text:span></text:p>
      <text:p text:style-name="P19"><text:span text:style-name="T20">FINISHED DATE PROJECT:<text:s/></text:span><text:span text:style-name="T21">18</text:span><text:span text:style-name="T22">th</text:span><text:span text:style-name="T23"><text:s/>of June</text:span></text:p>
      <text:p text:style-name="P24">STUDENT ID: 45559</text:p>
      <text:p text:style-name="P25"/>
      <text:p text:style-name="P26"><text:span text:style-name="T27">MY NETWORK APPLICATION PROJECT:<text:s/></text:span><text:span text:style-name="T28">LinguaGlobal Academy (Language Academy Dashboard)</text:span></text:p>
      <text:p text:style-name="P29">THE PROJECT IS A LANGUAGE ACADEMY<text:s/>(LINGUA) -<text:s/>WHICH INVOLVES LEARNING MULTIPLE LANGUAGES, THE COST<text:s/>OF LEARNING THEM, TO TUTOR THE PEOPLE/STUDENTS/USERS WITH THE LANGUAGE<text:s/>LEVEL OF WHAT IT REQUIRES AND TO LEARN MORE WORDS, SENTENCES, TO KNOW HOW TO SPEAK TO OTHER PEOPLE<text:s/>IN ANY LANGUAGE THEY WANT TO LEARN AND GAIN KNOWLEDGE, AND THE DASHBOARD OF THE AMOUNT OF THE PRICES, PEOPLE,<text:s/>PERCENTAGES, ETC.</text:p>
      <text:p text:style-name="P30"/>
      <text:p text:style-name="P31"/>
      <text:p text:style-name="P32">MY WORK:</text:p>
      <text:p text:style-name="P33"/>
      <text:p text:style-name="P34"><text:a xlink:href="http://localhost:62906/Default.aspx" office:target-frame-name="_top" xlink:show="replace"><text:span text:style-name="Hyperlink">http://localhost:62906/Default.aspx</text:span></text:a></text:p>
      <text:p text:style-name="P35"/>
      <text:p text:style-name="P36"/>
      <text:p text:style-name="P37">STEPS ON HOW I DID MY MINI LINGUAGLOBAL ACADEMY LANGUAGE ACADEMY DASBOARD:</text:p>
      <text:p text:style-name="Normal"/>
      <text:list text:style-name="LFO2" text:continue-numbering="true">
        <text:list-item>
          <text:p text:style-name="P38">I opened Microsoft Visual Studio</text:p>
        </text:list-item>
        <text:list-item>
          <text:p text:style-name="P39">Created new project in Microsoft VS</text:p>
        </text:list-item>
        <text:list-item>
          <text:p text:style-name="P40">I had<text:s/>chosen<text:s/>Web Service Application (+C)</text:p>
        </text:list-item>
        <text:list-item>
          <text:p text:style-name="P41">Then I<text:s/>named<text:s/>my file of the project:(language academy service)<text:s/>and chose with (<text:span text:style-name="T42">.NET Framework 4.8</text:span><text:span text:style-name="T43">.)</text:span></text:p>
        </text:list-item>
        <text:list-item>
          <text:p text:style-name="P44">Then it had opened the file<text:s/>for to create the project</text:p>
        </text:list-item>
        <text:list-item>
          <text:p text:style-name="P45">At my side, there was a solution language academy service and below that there was (Iservice1.cs) and double clicked on it</text:p>
        </text:list-item>
        <text:list-item>
          <text:p text:style-name="P46">I had after erased the old code which was not usable and had created a<text:s/>new one to make the application work</text:p>
        </text:list-item>
        <text:list-item>
          <text:p text:style-name="P47">(Iservice1.cs) - defines inside the user profile, dashboard numbers, the prices, and language grades</text:p>
        </text:list-item>
        <text:list-item>
          <text:p text:style-name="P48">The other step – is to click the little arrow next to (Service1.svc) and it will reveal (Service.svc.cs), and<text:s/>I<text:s/>had doubled clicked on<text:s/>it and did the same exact task<text:s/>as<text:s/>(Iservice1.cs)<text:s/>with a new code<text:s/>and started to build it to make it soon to run the application<text:s/>dashboard</text:p>
        </text:list-item>
        <text:list-item>
          <text:p text:style-name="P49">(Service.svc.cs) - defines inside the all the names, descriptions,<text:s/>prices, and the dashboard numbers</text:p>
        </text:list-item>
        <text:list-item>
          <text:p text:style-name="P50">Before making the client interface, I had decided to make that<text:s/>my backend will work, and it will run flawlessly<text:s/></text:p>
        </text:list-item>
        <text:list-item>
          <text:p text:style-name="P51">Started the green button on top of the visual studio, then the WCF<text:s/>Test Client will pop up, double clicked the (GetAcademymyDetails(),GetAcademymyprofile(), GetAcademymyDashboard()), clicked the invoke button, then the<text:s/>pricing, names, description, numbers will appear in response to the section down<text:s/>below without any errors and then close that window to stop debugging</text:p>
        </text:list-item>
        <text:list-item>
          <text:p text:style-name="P52">We go to the top menu bar of VISUAL STUDIO and<text:s/><text:bookmark-start text:name="_Int_cRj5FzKO"/>click:<text:bookmark-end text:name="_Int_cRj5FzKO"/><text:s/>project – add new item and in that<text:s/>list,<text:s/>you select<text:s/>from them the WEB FORM and you click on it and name it exactly: (Default.aspx) and click add</text:p>
        </text:list-item>
        <text:list-item>
          <text:p text:style-name="P53">Then you double click on it and do the same exact previous 2 tasks which was done</text:p>
        </text:list-item>
        <text:list-item>
          <text:p text:style-name="P54">(Default.aspx) - it builds inside the<text:s/>home page layout, profile card, metric dashboard cards, and a clean CSS-based bar graph</text:p>
        </text:list-item>
        <text:list-item>
          <text:p text:style-name="P55">Click on the small expansion arrow right next to (Default.aspx)<text:s/>to see it's hidden file which is called (Default.aspx.cs)<text:s/></text:p>
        </text:list-item>
        <text:list-item>
          <text:p text:style-name="P56">Double click on it and repeat doing the same routine just as i had on these last tasks</text:p>
        </text:list-item>
        <text:list-item>
          <text:p text:style-name="P57">(Default.aspx.cs) - it quires inside the WCF data which will instantly<text:s/>upon page upload and draws the dashboard bars</text:p>
        </text:list-item>
        <text:list-item>
          <text:p text:style-name="P58">Right click on the (Default.aspx), and choose to view it in browser<text:s/>on the right</text:p>
        </text:list-item>
        <text:list-item>
          <text:p text:style-name="P59">Select as start page<text:s/></text:p>
        </text:list-item>
        <text:list-item>
          <text:p text:style-name="P60">And then you press the green start button at the<text:s/>top of your visual studio interface</text:p>
        </text:list-item>
        <text:list-item>
          <text:p text:style-name="P61">And it will launch and be shown<text:s/>the web system layout<text:s/>all<text:s/>with everything it is needed<text:s/><text:bookmark-start text:name="_Int_pfn6Zmnx"/>like:<text:bookmark-end text:name="_Int_pfn6Zmnx"/><text:s/>required language<text:s/>information, pricing blocks, student data, and colorful live tracking visual graph which is mapped<text:s/>straight from your backend WCF architecture<text:s/>and the end.<text:s/></text:p>
        </text:list-item>
      </text:list>
      <text:p text:style-name="P62"/>
      <text:p text:style-name="P63"/>
      <text:p text:style-name="P64"/>
      <text:p text:style-name="P65"/>
      <text:p text:style-name="P66">ALL CODES:</text:p>
      <text:p text:style-name="P67"/>
      <text:list text:style-name="LFO1" text:continue-numbering="true">
        <text:list-item>
          <text:p text:style-name="P68">(Iservice1.cs):</text:p>
        </text:list-item>
      </text:list>
      <text:p text:style-name="P69">using System;</text:p>
      <text:p text:style-name="P70">using System.Collections.Generic;</text:p>
      <text:p text:style-name="P71">using System.Runtime.Serialization;</text:p>
      <text:p text:style-name="P72">using System.ServiceModel;</text:p>
      <text:p text:style-name="P73"><text:s/></text:p>
      <text:p text:style-name="P74">namespace LanguageAcademyService5</text:p>
      <text:p text:style-name="P75">{</text:p>
      <text:p text:style-name="P76"><text:s text:c="4"/>[ServiceContract]</text:p>
      <text:p text:style-name="P77"><text:s text:c="4"/>public interface IService1</text:p>
      <text:p text:style-name="P78"><text:s text:c="4"/>{</text:p>
      <text:p text:style-name="P79"><text:s text:c="8"/>[OperationContract]</text:p>
      <text:p text:style-name="P80"><text:s text:c="8"/>AcademyInfo GetAcademyDetails();</text:p>
      <text:p text:style-name="P81"><text:s/></text:p>
      <text:p text:style-name="P82"><text:s text:c="8"/>[OperationContract]</text:p>
      <text:p text:style-name="P83"><text:s text:c="8"/>StudentProfile GetStudentProfile();</text:p>
      <text:p text:style-name="P84"><text:s/></text:p>
      <text:p text:style-name="P85"><text:s text:c="8"/>[OperationContract]</text:p>
      <text:p text:style-name="P86"><text:s text:c="8"/>DashboardData GetDashboardData();</text:p>
      <text:p text:style-name="P87"><text:s text:c="4"/>}</text:p>
      <text:p text:style-name="P88"><text:s/></text:p>
      <text:p text:style-name="P89"><text:s text:c="4"/>[DataContract]</text:p>
      <text:p text:style-name="P90"><text:s text:c="4"/>public class AcademyInfo</text:p>
      <text:p text:style-name="P91"><text:s text:c="4"/>{</text:p>
      <text:p text:style-name="P92"><text:s text:c="8"/>[DataMember] public string Name { get; set; }</text:p>
      <text:p text:style-name="P93"><text:s text:c="8"/>[DataMember] public string Description { get; set; }</text:p>
      <text:p text:style-name="P94"><text:s text:c="8"/>[DataMember] public string Importance { get; set; }</text:p>
      <text:p text:style-name="P95"><text:s text:c="8"/>[DataMember] public string HowItWorks { get; set; }</text:p>
      <text:p text:style-name="P96"><text:s text:c="8"/>[DataMember] public string MonthlyPrice { get; set; }</text:p>
      <text:p text:style-name="P97"><text:s text:c="8"/>[DataMember] public string YearlyPrice { get; set; }</text:p>
      <text:p text:style-name="P98"><text:s text:c="4"/>}</text:p>
      <text:p text:style-name="P99"><text:s/></text:p>
      <text:p text:style-name="P100"><text:s text:c="4"/>[DataContract]</text:p>
      <text:p text:style-name="P101"><text:s text:c="4"/>public class StudentProfile</text:p>
      <text:p text:style-name="P102"><text:s text:c="4"/>{</text:p>
      <text:p text:style-name="P103"><text:s text:c="8"/>[DataMember] public string FullName { get; set; }</text:p>
      <text:p text:style-name="P104"><text:s text:c="8"/>[DataMember] public string StudentID { get; set; }</text:p>
      <text:p text:style-name="P105"><text:s text:c="8"/>[DataMember] public string EnrolledProgram { get; set; }</text:p>
      <text:p text:style-name="P106"><text:s text:c="8"/>[DataMember] public string Level { get; set; }</text:p>
      <text:p text:style-name="P107"><text:s text:c="4"/>}</text:p>
      <text:p text:style-name="P108"><text:s/></text:p>
      <text:p text:style-name="P109"><text:s text:c="4"/>[DataContract]</text:p>
      <text:p text:style-name="P110"><text:s text:c="4"/>public class DashboardData</text:p>
      <text:p text:style-name="P111"><text:s text:c="4"/>{</text:p>
      <text:p text:style-name="P112"><text:s text:c="8"/>[DataMember] public int TotalHoursLearned { get; set; }</text:p>
      <text:p text:style-name="P113"><text:s text:c="8"/>[DataMember] public int CompletedLessons { get; set; }</text:p>
      <text:p text:style-name="P114"><text:s text:c="8"/>[DataMember] public double OverallProgressPercentage { get; set; }</text:p>
      <text:p text:style-name="P115"><text:s text:c="8"/>[DataMember] public Dictionary&lt;string, int&gt; LanguageGrades { get; set; }</text:p>
      <text:p text:style-name="P116"><text:s text:c="4"/>}</text:p>
      <text:p text:style-name="P117">}</text:p>
      <text:list text:style-name="LFO1" text:continue-numbering="true">
        <text:list-item>
          <text:p text:style-name="P118">(Service.svc.cs):</text:p>
        </text:list-item>
      </text:list>
      <text:p text:style-name="P119"/>
      <text:p text:style-name="P120">using System;</text:p>
      <text:p text:style-name="P121">using System.Collections.Generic;</text:p>
      <text:p text:style-name="P122"><text:s/></text:p>
      <text:p text:style-name="P123">namespace LanguageAcademyService5</text:p>
      <text:p text:style-name="P124">{</text:p>
      <text:p text:style-name="P125"><text:s text:c="4"/>public class Service1 : IService1</text:p>
      <text:p text:style-name="P126"><text:s text:c="4"/>{</text:p>
      <text:p text:style-name="P127"><text:s text:c="8"/>public AcademyInfo GetAcademyDetails()</text:p>
      <text:p text:style-name="P128"><text:s text:c="8"/>{</text:p>
      <text:p text:style-name="P129"><text:s text:c="12"/>return new AcademyInfo</text:p>
      <text:p text:style-name="P130"><text:s text:c="12"/>{</text:p>
      <text:p text:style-name="P131"><text:s text:c="16"/>Name = "LinguaGlobal Academy",</text:p>
      <text:p text:style-name="P132"><text:s text:c="16"/>Description = "A premier language learning platform designed for immersive tutoring.",</text:p>
      <text:p text:style-name="P133"><text:s text:c="16"/>Importance = "Fluency opens global career opportunities and bridges cultural gaps.",</text:p>
      <text:p text:style-name="P134"><text:s text:c="16"/>HowItWorks = "We pair you with certified native speakers for interactive 1-on-1 online sessions.",</text:p>
      <text:p text:style-name="P135"><text:s text:c="16"/>MonthlyPrice = "$49 / month",</text:p>
      <text:p text:style-name="P136"><text:s text:c="16"/>YearlyPrice = "$450 / year (Save 25%)"</text:p>
      <text:p text:style-name="P137"><text:s text:c="12"/>};</text:p>
      <text:p text:style-name="P138"><text:s text:c="8"/>}</text:p>
      <text:p text:style-name="P139"><text:s/></text:p>
      <text:p text:style-name="P140"><text:s text:c="8"/>public StudentProfile GetStudentProfile()</text:p>
      <text:p text:style-name="P141"><text:s text:c="8"/>{</text:p>
      <text:p text:style-name="P142"><text:s text:c="12"/>return new StudentProfile</text:p>
      <text:p text:style-name="P143"><text:s text:c="12"/>{</text:p>
      <text:p text:style-name="P144"><text:s text:c="16"/>FullName = "John Doe",</text:p>
      <text:p text:style-name="P145"><text:s text:c="16"/>StudentID = "LA-2026-8941",</text:p>
      <text:p text:style-name="P146"><text:s text:c="16"/>EnrolledProgram = "Dual-Language Immersive Track",</text:p>
      <text:p text:style-name="P147"><text:s text:c="16"/>Level = "Intermediate (B2)"</text:p>
      <text:p text:style-name="P148"><text:s text:c="12"/>};</text:p>
      <text:p text:style-name="P149"><text:s text:c="8"/>}</text:p>
      <text:p text:style-name="P150"><text:s/></text:p>
      <text:p text:style-name="P151"><text:s text:c="8"/>public DashboardData GetDashboardData()</text:p>
      <text:p text:style-name="P152"><text:s text:c="8"/>{</text:p>
      <text:p text:style-name="P153"><text:s text:c="12"/>return new DashboardData</text:p>
      <text:p text:style-name="P154"><text:s text:c="12"/>{</text:p>
      <text:p text:style-name="P155"><text:s text:c="16"/>TotalHoursLearned = 124,</text:p>
      <text:p text:style-name="P156"><text:s text:c="16"/>CompletedLessons = 48,</text:p>
      <text:p text:style-name="P157"><text:s text:c="16"/>OverallProgressPercentage = 78.5,</text:p>
      <text:p text:style-name="P158"><text:s text:c="16"/>LanguageGrades = new Dictionary&lt;string, int&gt;</text:p>
      <text:p text:style-name="P159"><text:s text:c="16"/>{</text:p>
      <text:p text:style-name="P160"><text:s text:c="20"/>{ "Spanish (B2)", 88 },</text:p>
      <text:p text:style-name="P161"><text:s text:c="20"/>{ "French (A1)", 92 },</text:p>
      <text:p text:style-name="P162"><text:s text:c="20"/>{ "German (A2)", 75 }</text:p>
      <text:p text:style-name="P163"><text:s text:c="16"/>}</text:p>
      <text:p text:style-name="P164"><text:s text:c="12"/>};</text:p>
      <text:p text:style-name="P165"><text:s text:c="8"/>}</text:p>
      <text:p text:style-name="P166"><text:s text:c="4"/>}</text:p>
      <text:p text:style-name="P167">}</text:p>
      <text:p text:style-name="P168"/>
      <text:list text:style-name="LFO1" text:continue-numbering="true">
        <text:list-item>
          <text:p text:style-name="P169">(Default.aspx):</text:p>
        </text:list-item>
      </text:list>
      <text:p text:style-name="P170"/>
      <text:p text:style-name="P171">&lt;%@ Page Language="C#" AutoEventWireup="true" CodeBehind="Default.aspx.cs" Inherits="LanguageAcademyService5.Default" %&gt;</text:p>
      <text:p text:style-name="P172"><text:s/></text:p>
      <text:p text:style-name="P173">&lt;!DOCTYPE html&gt;</text:p>
      <text:p text:style-name="P174">&lt;html xmlns="http://www.w3.org/1999/xhtml"&gt;</text:p>
      <text:p text:style-name="P175">&lt;head runat="server"&gt;</text:p>
      <text:p text:style-name="P176"><text:s text:c="4"/>&lt;title&gt;Language Academy Dashboard&lt;/title&gt;</text:p>
      <text:p text:style-name="P177"><text:s text:c="4"/>&lt;style&gt;</text:p>
      <text:p text:style-name="P178"><text:s text:c="8"/>body { font-family: 'Segoe UI', Tahoma, Geneva, Verdana, sans-serif; background-color: #f4f6f9; margin: 0; padding: 20px; color: #333; }</text:p>
      <text:p text:style-name="P179"><text:s text:c="8"/>.container { max-width: 1100px; margin: 0 auto; }</text:p>
      <text:p text:style-name="P180"><text:s text:c="8"/>.header { background: #4A154B; color: white; padding: 20px; border-radius: 8px; margin-bottom: 20px; text-align: center; }</text:p>
      <text:p text:style-name="P181"><text:s text:c="8"/>.grid { display: grid; grid-template-columns: 2fr 1fr; gap: 20px; }</text:p>
      <text:p text:style-name="P182"><text:s text:c="8"/>.card { background: white; padding: 25px; border-radius: 8px; box-shadow: 0 4px 6px rgba(0,0,0,0.05); margin-bottom: 20px; }</text:p>
      <text:p text:style-name="P183"><text:s text:c="8"/>h2 { color: #4A154B; border-bottom: 2px solid #f4f6f9; padding-bottom: 10px; margin-top: 0; }</text:p>
      <text:p text:style-name="P184"><text:s text:c="8"/>.price-tag { display: inline-block; background: #E01E5A; color: white; padding: 8px 15px; border-radius: 20px; font-weight: bold; margin-right: 10px; }</text:p>
      <text:p text:style-name="P185"><text:s text:c="8"/>.metric-box { display: inline-block; background: #f4f6f9; padding: 15px; border-radius: 6px; text-align: center; min-width: 100px; margin-right: 15px; }</text:p>
      <text:p text:style-name="P186"><text:s text:c="8"/>.metric-num { font-size: 24px; font-weight: bold; color: #4A154B; }</text:p>
      <text:p text:style-name="P187"><text:s text:c="8"/>.bar-container { background-color: #e0e0e0; border-radius: 12px; margin: 15px 0; position: relative; height: 25px; }</text:p>
      <text:p text:style-name="P188"><text:s text:c="8"/>.bar-fill { background-color: #2EB67D; height: 100%; border-radius: 12px; text-align: right; line-height: 25px; color: white; padding-right: 10px; font-weight: bold; font-size: 13px; }</text:p>
      <text:p text:style-name="P189"><text:s text:c="8"/>.subject-row { margin-bottom: 15px; }</text:p>
      <text:p text:style-name="P190"><text:s text:c="8"/>.subject-name { font-weight: bold; margin-bottom: 5px; }</text:p>
      <text:p text:style-name="P191"><text:s text:c="4"/>&lt;/style&gt;</text:p>
      <text:p text:style-name="P192">&lt;/head&gt;</text:p>
      <text:p text:style-name="P193">&lt;body&gt;</text:p>
      <text:p text:style-name="P194"><text:s text:c="4"/>&lt;form id="form1" runat="server"&gt;</text:p>
      <text:p text:style-name="P195"><text:s text:c="8"/>&lt;div class="container"&gt;</text:p>
      <text:p text:style-name="P196"><text:s text:c="12"/></text:p>
      <text:p text:style-name="P197"><text:s text:c="12"/>&lt;div class="header"&gt;</text:p>
      <text:p text:style-name="P198"><text:s text:c="16"/>&lt;h1&gt;&lt;asp:Label ID="lblAcademyName" runat="server"&gt;&lt;/asp:Label&gt;&lt;/h1&gt;</text:p>
      <text:p text:style-name="P199"><text:s text:c="16"/>&lt;p&gt;Your Gateway to Global Communication&lt;/p&gt;</text:p>
      <text:p text:style-name="P200"><text:s text:c="12"/>&lt;/div&gt;</text:p>
      <text:p text:style-name="P201"><text:s/></text:p>
      <text:p text:style-name="P202"><text:s text:c="12"/>&lt;div class="grid"&gt;</text:p>
      <text:p text:style-name="P203"><text:s text:c="16"/>&lt;div&gt;</text:p>
      <text:p text:style-name="P204"><text:s text:c="20"/>&lt;div class="card"&gt;</text:p>
      <text:p text:style-name="P205"><text:s text:c="24"/>&lt;h2&gt;About Our Academy&lt;/h2&gt;</text:p>
      <text:p text:style-name="P206"><text:s text:c="24"/>&lt;p&gt;&lt;strong&gt;What it is:&lt;/strong&gt; &lt;asp:Label ID="lblDesc" runat="server"&gt;&lt;/asp:Label&gt;&lt;/p&gt;</text:p>
      <text:p text:style-name="P207"><text:s text:c="24"/>&lt;p&gt;&lt;strong&gt;Why it matters:&lt;/strong&gt; &lt;asp:Label ID="lblImportance" runat="server"&gt;&lt;/asp:Label&gt;&lt;/p&gt;</text:p>
      <text:p text:style-name="P208"><text:s text:c="24"/>&lt;p&gt;&lt;strong&gt;How it works:&lt;/strong&gt; &lt;asp:Label ID="lblHow" runat="server"&gt;&lt;/asp:Label&gt;&lt;/p&gt;</text:p>
      <text:p text:style-name="P209"><text:s text:c="20"/>&lt;/div&gt;</text:p>
      <text:p text:style-name="P210"><text:s/></text:p>
      <text:p text:style-name="P211"><text:s text:c="20"/>&lt;div class="card"&gt;</text:p>
      <text:p text:style-name="P212"><text:s text:c="24"/>&lt;h2&gt;Student Learning Dashboard&lt;/h2&gt;</text:p>
      <text:p text:style-name="P213"><text:s text:c="24"/>&lt;div style="margin-bottom: 25px;"&gt;</text:p>
      <text:p text:style-name="P214"><text:s text:c="28"/>&lt;div class="metric-box"&gt;</text:p>
      <text:p text:style-name="P215"><text:s text:c="32"/>&lt;div class="metric-num"&gt;&lt;asp:Label ID="lblHours" runat="server"&gt;&lt;/asp:Label&gt;&lt;/div&gt;</text:p>
      <text:p text:style-name="P216"><text:s text:c="32"/>&lt;div&gt;Hours Studied&lt;/div&gt;</text:p>
      <text:p text:style-name="P217"><text:s text:c="28"/>&lt;/div&gt;</text:p>
      <text:p text:style-name="P218"><text:s text:c="28"/>&lt;div class="metric-box"&gt;</text:p>
      <text:p text:style-name="P219"><text:s text:c="32"/>&lt;div class="metric-num"&gt;&lt;asp:Label ID="lblLessons" runat="server"&gt;&lt;/asp:Label&gt;&lt;/div&gt;</text:p>
      <text:p text:style-name="P220"><text:s text:c="32"/>&lt;div&gt;Lessons Finished&lt;/div&gt;</text:p>
      <text:p text:style-name="P221"><text:s text:c="28"/>&lt;/div&gt;</text:p>
      <text:p text:style-name="P222"><text:s text:c="28"/>&lt;div class="metric-box"&gt;</text:p>
      <text:p text:style-name="P223"><text:s text:c="32"/>&lt;div class="metric-num"&gt;&lt;asp:Label ID="lblProgress" runat="server"&gt;&lt;/asp:Label&gt;%&lt;/div&gt;</text:p>
      <text:p text:style-name="P224"><text:s text:c="32"/>&lt;div&gt;Total Progress&lt;/div&gt;</text:p>
      <text:p text:style-name="P225"><text:s text:c="28"/>&lt;/div&gt;</text:p>
      <text:p text:style-name="P226"><text:s text:c="24"/>&lt;/div&gt;</text:p>
      <text:p text:style-name="P227"><text:s/></text:p>
      <text:p text:style-name="P228"><text:s text:c="24"/>&lt;h3&gt;Subject Course Results (Grades)&lt;/h3&gt;</text:p>
      <text:p text:style-name="P229"><text:s text:c="24"/>&lt;asp:PlaceHolder ID="phGradesGraph" runat="server"&gt;&lt;/asp:PlaceHolder&gt;</text:p>
      <text:p text:style-name="P230"><text:s text:c="20"/>&lt;/div&gt;</text:p>
      <text:p text:style-name="P231"><text:s text:c="16"/>&lt;/div&gt;</text:p>
      <text:p text:style-name="P232"><text:s/></text:p>
      <text:p text:style-name="P233"><text:s text:c="16"/>&lt;div&gt;</text:p>
      <text:p text:style-name="P234"><text:s text:c="20"/>&lt;div class="card"&gt;</text:p>
      <text:p text:style-name="P235"><text:s text:c="24"/>&lt;h2&gt;Student Profile&lt;/h2&gt;</text:p>
      <text:p text:style-name="P236"><text:s text:c="24"/>&lt;p&gt;&lt;strong&gt;Name:&lt;/strong&gt; &lt;asp:Label ID="lblStudentName" runat="server"&gt;&lt;/asp:Label&gt;&lt;/p&gt;</text:p>
      <text:p text:style-name="P237"><text:s text:c="24"/>&lt;p&gt;&lt;strong&gt;ID:&lt;/strong&gt; &lt;asp:Label ID="lblStudentID" runat="server"&gt;&lt;/asp:Label&gt;&lt;/p&gt;</text:p>
      <text:p text:style-name="P238"><text:s text:c="24"/>&lt;p&gt;&lt;strong&gt;Program:&lt;/strong&gt; &lt;asp:Label ID="lblProgram" runat="server"&gt;&lt;/asp:Label&gt;&lt;/p&gt;</text:p>
      <text:p text:style-name="P239"><text:s text:c="24"/>&lt;p&gt;&lt;strong&gt;Current Status:&lt;/strong&gt; &lt;asp:Label ID="lblLevel" runat="server"&gt;&lt;/asp:Label&gt;&lt;/p&gt;</text:p>
      <text:p text:style-name="P240"><text:s text:c="20"/>&lt;/div&gt;</text:p>
      <text:p text:style-name="P241"><text:s/></text:p>
      <text:p text:style-name="P242"><text:s text:c="20"/>&lt;div class="card"&gt;</text:p>
      <text:p text:style-name="P243"><text:s text:c="24"/>&lt;h2&gt;Academy Tuition Plans&lt;/h2&gt;</text:p>
      <text:p text:style-name="P244"><text:s text:c="24"/>&lt;p&gt;Standard Month-to-Month Access:&lt;/p&gt;</text:p>
      <text:p text:style-name="P245"><text:s text:c="24"/>&lt;span class="price-tag"&gt;&lt;asp:Label ID="lblMonthPrice" runat="server"&gt;&lt;/asp:Label&gt;&lt;/span&gt;</text:p>
      <text:p text:style-name="P246"><text:s text:c="24"/>&lt;p style="margin-top: 20px;"&gt;Annual Discounted Membership:&lt;/p&gt;</text:p>
      <text:p text:style-name="P247"><text:s text:c="24"/>&lt;span class="price-tag" style="background:#4A154B;"&gt;&lt;asp:Label ID="lblYearPrice" runat="server"&gt;&lt;/asp:Label&gt;&lt;/span&gt;</text:p>
      <text:p text:style-name="P248"><text:s text:c="20"/>&lt;/div&gt;</text:p>
      <text:p text:style-name="P249"><text:s text:c="16"/>&lt;/div&gt;</text:p>
      <text:p text:style-name="P250"><text:s text:c="12"/>&lt;/div&gt;</text:p>
      <text:p text:style-name="P251"><text:s/></text:p>
      <text:p text:style-name="P252"><text:s text:c="8"/>&lt;/div&gt;</text:p>
      <text:p text:style-name="P253"><text:s text:c="4"/>&lt;/form&gt;</text:p>
      <text:p text:style-name="P254">&lt;/body&gt;</text:p>
      <text:p text:style-name="P255">&lt;/html&gt;</text:p>
      <text:p text:style-name="P256"/>
      <text:list text:style-name="LFO1" text:continue-numbering="true">
        <text:list-item>
          <text:p text:style-name="P257">(Default.aspx.cs):</text:p>
        </text:list-item>
      </text:list>
      <text:p text:style-name="P258"/>
      <text:p text:style-name="P259">using System;</text:p>
      <text:p text:style-name="P260">using System.Web.UI;</text:p>
      <text:p text:style-name="P261">using System.Web.UI.WebControls;</text:p>
      <text:p text:style-name="P262"><text:s/></text:p>
      <text:p text:style-name="P263">namespace LanguageAcademyService5</text:p>
      <text:p text:style-name="P264">{</text:p>
      <text:p text:style-name="P265"><text:s text:c="4"/>public partial class Default : System.Web.UI.Page</text:p>
      <text:p text:style-name="P266"><text:s text:c="4"/>{</text:p>
      <text:p text:style-name="P267"><text:s text:c="8"/>protected void Page_Load(object sender, EventArgs e)</text:p>
      <text:p text:style-name="P268"><text:s text:c="8"/>{</text:p>
      <text:p text:style-name="P269"><text:s text:c="12"/>if (!IsPostBack)</text:p>
      <text:p text:style-name="P270"><text:s text:c="12"/>{</text:p>
      <text:p text:style-name="P271"><text:s text:c="16"/>try</text:p>
      <text:p text:style-name="P272"><text:s text:c="16"/>{</text:p>
      <text:p text:style-name="P273"><text:s text:c="20"/>// Directly instantiate our WCF service class internally to read configuration data smoothly</text:p>
      <text:p text:style-name="P274"><text:s text:c="20"/>Service1 service = new Service1();</text:p>
      <text:p text:style-name="P275"><text:s/></text:p>
      <text:p text:style-name="P276"><text:s text:c="20"/>// 1. Fetch and bind Academy Presentation Text</text:p>
      <text:p text:style-name="P277"><text:s text:c="20"/>var academy = service.GetAcademyDetails();</text:p>
      <text:p text:style-name="P278"><text:s text:c="20"/>lblAcademyName.Text = academy.Name;</text:p>
      <text:p text:style-name="P279"><text:s text:c="20"/>lblDesc.Text = academy.Description;</text:p>
      <text:p text:style-name="P280"><text:s text:c="20"/>lblImportance.Text = academy.Importance;</text:p>
      <text:p text:style-name="P281"><text:s text:c="20"/>lblHow.Text = academy.HowItWorks;</text:p>
      <text:p text:style-name="P282"><text:s text:c="20"/>lblMonthPrice.Text = academy.MonthlyPrice;</text:p>
      <text:p text:style-name="P283"><text:s text:c="20"/>lblYearPrice.Text = academy.YearlyPrice;</text:p>
      <text:p text:style-name="P284"><text:s/></text:p>
      <text:p text:style-name="P285"><text:s text:c="20"/>// 2. Fetch and bind Student Profile Information</text:p>
      <text:p text:style-name="P286"><text:s text:c="20"/>var profile = service.GetStudentProfile();</text:p>
      <text:p text:style-name="P287"><text:s text:c="20"/>lblStudentName.Text = profile.FullName;</text:p>
      <text:p text:style-name="P288"><text:s text:c="20"/>lblStudentID.Text = profile.StudentID;</text:p>
      <text:p text:style-name="P289"><text:s text:c="20"/>lblProgram.Text = profile.EnrolledProgram;</text:p>
      <text:p text:style-name="P290"><text:s text:c="20"/>lblLevel.Text = profile.Level;</text:p>
      <text:p text:style-name="P291"><text:s/></text:p>
      <text:p text:style-name="P292"><text:s text:c="20"/>// 3. Fetch Metrics and render Dynamic Dashboard HTML Graphs</text:p>
      <text:p text:style-name="P293"><text:s text:c="20"/>var dashboard = service.GetDashboardData();</text:p>
      <text:p text:style-name="P294"><text:s text:c="20"/>lblHours.Text = dashboard.TotalHoursLearned.ToString();</text:p>
      <text:p text:style-name="P295"><text:s text:c="20"/>lblLessons.Text = dashboard.CompletedLessons.ToString();</text:p>
      <text:p text:style-name="P296"><text:s text:c="20"/>lblProgress.Text = dashboard.OverallProgressPercentage.ToString("0.0");</text:p>
      <text:p text:style-name="P297"><text:s/></text:p>
      <text:p text:style-name="P298"><text:s text:c="20"/>// Build the language bar graphs natively from the dictionary</text:p>
      <text:p text:style-name="P299"><text:s text:c="20"/>foreach (var subject in dashboard.LanguageGrades)</text:p>
      <text:p text:style-name="P300"><text:s text:c="20"/>{</text:p>
      <text:p text:style-name="P301"><text:s text:c="24"/>string subjectHtml = $@"</text:p>
      <text:p text:style-name="P302"><text:s text:c="28"/>&lt;div class='subject-row'&gt;</text:p>
      <text:p text:style-name="P303"><text:s text:c="32"/>&lt;div class='subject-name'&gt;{subject.Key} — Current Grade: {subject.Value}%&lt;/div&gt;</text:p>
      <text:p text:style-name="P304"><text:s text:c="32"/>&lt;div class='bar-container'&gt;</text:p>
      <text:p text:style-name="P305"><text:s text:c="36"/>&lt;div class='bar-fill' style='width: {subject.Value}%;'&gt;{subject.Value}%&lt;/div&gt;</text:p>
      <text:p text:style-name="P306"><text:s text:c="32"/>&lt;/div&gt;</text:p>
      <text:p text:style-name="P307"><text:s text:c="28"/>&lt;/div&gt;";</text:p>
      <text:p text:style-name="P308"><text:s text:c="24"/></text:p>
      <text:p text:style-name="P309"><text:s text:c="24"/>phGradesGraph.Controls.Add(new LiteralControl(subjectHtml));</text:p>
      <text:p text:style-name="P310"><text:s text:c="20"/>}</text:p>
      <text:p text:style-name="P311"><text:s text:c="16"/>}</text:p>
      <text:p text:style-name="P312"><text:s text:c="16"/>catch (Exception ex)</text:p>
      <text:p text:style-name="P313"><text:s text:c="16"/>{</text:p>
      <text:p text:style-name="P314"><text:s text:c="20"/>lblAcademyName.Text = "System Error loading dashboard data: " + ex.Message;</text:p>
      <text:p text:style-name="P315"><text:s text:c="16"/>}</text:p>
      <text:p text:style-name="P316"><text:s text:c="12"/>}</text:p>
      <text:p text:style-name="P317"><text:s text:c="8"/>}</text:p>
      <text:p text:style-name="P318"><text:s text:c="4"/>}</text:p>
      <text:p text:style-name="P319">}</text:p>
      <text:p text:style-name="P320"/>
      <text:p text:style-name="P321"/>
      <text:p text:style-name="P322"/>
      <text:p text:style-name="P323"/>
      <text:p text:style-name="P324"/>
      <text:p text:style-name="P3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ana Loutfi Čučaković</meta:initial-creator>
    <dc:creator>Diana Loutfi Čučaković</dc:creator>
    <meta:creation-date>2026-06-18T00:47:00Z</meta:creation-date>
    <dc:date>2026-06-18T00:47:00Z</dc:date>
    <meta:template xlink:href="Normal.dotm" xlink:type="simple"/>
    <meta:editing-cycles>1</meta:editing-cycles>
    <meta:editing-duration>PT0S</meta:editing-duration>
    <meta:document-statistic meta:page-count="1" meta:paragraph-count="28" meta:word-count="2139" meta:character-count="14306" meta:row-count="101" meta:non-whitespace-character-count="12195"/>
  </office:meta>
</office:document-meta>
</file>