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Aptos"/>
    </style:style>
    <style:style style:name="T5" style:parent-style-name="DefaultParagraphFont" style:family="text">
      <style:text-properties style:font-name="Aptos" fo:font-weight="bold" style:font-weight-asian="bold" style:font-weight-complex="bold"/>
    </style:style>
    <style:style style:name="P6" style:parent-style-name="Normal" style:family="paragraph">
      <style:text-properties style:font-name="Aptos" fo:font-weight="bold" style:font-weight-asian="bold" style:font-weight-complex="bold"/>
    </style:style>
    <style:style style:name="P7" style:parent-style-name="Normal" style:family="paragraph">
      <style:text-properties style:font-name="Apto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ListParagraph" style:list-style-name="LFO8" style:family="paragraph">
      <style:text-properties style:font-name="Aptos"/>
    </style:style>
    <style:style style:name="T9" style:parent-style-name="DefaultParagraphFont" style:family="text">
      <style:text-properties style:font-name="Aptos" fo:font-weight="bold" style:font-weight-asian="bold" style:font-weight-complex="bold"/>
    </style:style>
    <style:style style:name="T10" style:parent-style-name="DefaultParagraphFont" style:family="text">
      <style:text-properties style:font-name="Aptos"/>
    </style:style>
    <style:style style:name="P11" style:parent-style-name="Normal" style:family="paragraph">
      <style:text-properties style:font-name="Aptos"/>
    </style:style>
    <style:style style:name="P12" style:parent-style-name="ListParagraph" style:list-style-name="LFO8" style:family="paragraph">
      <style:text-properties style:font-name="Aptos"/>
    </style:style>
    <style:style style:name="P13" style:parent-style-name="Normal" style:family="paragraph">
      <style:text-properties style:font-name="Aptos"/>
    </style:style>
    <style:style style:name="P14" style:parent-style-name="Normal" style:family="paragraph">
      <style:text-properties style:font-name="Aptos"/>
    </style:style>
    <style:style style:name="P15" style:parent-style-name="Normal" style:family="paragraph">
      <style:text-properties style:font-name="Aptos"/>
    </style:style>
    <style:style style:name="P16" style:parent-style-name="ListParagraph" style:list-style-name="LFO8" style:family="paragraph">
      <style:text-properties style:font-name="Aptos"/>
    </style:style>
    <style:style style:name="T17" style:parent-style-name="DefaultParagraphFont" style:family="text">
      <style:text-properties style:font-name="Aptos"/>
    </style:style>
    <style:style style:name="T18" style:parent-style-name="DefaultParagraphFont" style:family="text">
      <style:text-properties style:font-name="Aptos" fo:font-weight="bold" style:font-weight-asian="bold" style:font-weight-complex="bold"/>
    </style:style>
    <style:style style:name="T19" style:parent-style-name="DefaultParagraphFont" style:family="text">
      <style:text-properties style:font-name="Aptos"/>
    </style:style>
    <style:style style:name="P20" style:parent-style-name="Normal" style:family="paragraph">
      <style:text-properties style:font-name="Aptos"/>
    </style:style>
    <style:style style:name="P21" style:parent-style-name="Normal" style:family="paragraph">
      <style:text-properties style:font-name="Aptos"/>
    </style:style>
    <style:style style:name="P22" style:parent-style-name="ListParagraph" style:list-style-name="LFO8" style:family="paragraph">
      <style:text-properties style:font-name="Aptos"/>
    </style:style>
    <style:style style:name="T23" style:parent-style-name="DefaultParagraphFont" style:family="text">
      <style:text-properties style:font-name="Aptos"/>
    </style:style>
    <style:style style:name="T24" style:parent-style-name="DefaultParagraphFont" style:family="text">
      <style:text-properties style:font-name="Aptos" fo:font-weight="bold" style:font-weight-asian="bold" style:font-weight-complex="bold"/>
    </style:style>
    <style:style style:name="T25" style:parent-style-name="DefaultParagraphFont" style:family="text">
      <style:text-properties style:font-name="Aptos"/>
    </style:style>
    <style:style style:name="P26" style:parent-style-name="Normal" style:family="paragraph">
      <style:text-properties style:font-name="Aptos"/>
    </style:style>
    <style:style style:name="P27" style:parent-style-name="Normal" style:family="paragraph">
      <style:text-properties style:font-name="Aptos"/>
    </style:style>
    <style:style style:name="P28" style:parent-style-name="ListParagraph" style:list-style-name="LFO8" style:family="paragraph">
      <style:text-properties style:font-name="Aptos"/>
    </style:style>
    <style:style style:name="P29" style:parent-style-name="Normal" style:family="paragraph">
      <style:text-properties style:font-name="Aptos"/>
    </style:style>
    <style:style style:name="T30" style:parent-style-name="DefaultParagraphFont" style:family="text">
      <style:text-properties style:font-name="Aptos" fo:font-weight="bold" style:font-weight-asian="bold" style:font-weight-complex="bold"/>
    </style:style>
    <style:style style:name="T31" style:parent-style-name="DefaultParagraphFont" style:family="text">
      <style:text-properties style:font-name="Aptos"/>
    </style:style>
    <style:style style:name="T32" style:parent-style-name="DefaultParagraphFont" style:family="text">
      <style:text-properties style:font-name="Aptos" fo:font-weight="bold" style:font-weight-asian="bold" style:font-weight-complex="bold"/>
    </style:style>
    <style:style style:name="T33" style:parent-style-name="DefaultParagraphFont" style:family="text">
      <style:text-properties style:font-name="Aptos"/>
    </style:style>
    <style:style style:name="P34" style:parent-style-name="ListParagraph" style:family="paragraph">
      <style:text-properties style:font-name="Aptos"/>
    </style:style>
    <style:style style:name="P35" style:parent-style-name="ListParagraph" style:list-style-name="LFO8" style:family="paragraph">
      <style:text-properties style:font-name="Aptos"/>
    </style:style>
    <style:style style:name="P36" style:parent-style-name="Normal" style:family="paragraph">
      <style:text-properties style:font-name="Aptos"/>
    </style:style>
    <style:style style:name="T37" style:parent-style-name="DefaultParagraphFont" style:family="text">
      <style:text-properties style:font-name="Aptos"/>
    </style:style>
    <style:style style:name="T38" style:parent-style-name="DefaultParagraphFont" style:family="text">
      <style:text-properties style:font-name="Aptos" fo:font-weight="bold" style:font-weight-asian="bold" style:font-weight-complex="bold"/>
    </style:style>
    <style:style style:name="T39" style:parent-style-name="DefaultParagraphFont" style:family="text">
      <style:text-properties style:font-name="Aptos"/>
    </style:style>
    <style:style style:name="P40" style:parent-style-name="Normal" style:list-style-name="LFO6" style:family="paragraph"/>
    <style:style style:name="T41" style:parent-style-name="DefaultParagraphFont" style:family="text">
      <style:text-properties style:font-name="Aptos" fo:font-weight="bold" style:font-weight-asian="bold" style:font-weight-complex="bold"/>
    </style:style>
    <style:style style:name="T42" style:parent-style-name="DefaultParagraphFont" style:family="text">
      <style:text-properties style:font-name="Aptos"/>
    </style:style>
    <style:style style:name="P43" style:parent-style-name="Normal" style:list-style-name="LFO6" style:family="paragraph"/>
    <style:style style:name="T44" style:parent-style-name="DefaultParagraphFont" style:family="text">
      <style:text-properties style:font-name="Aptos" fo:font-weight="bold" style:font-weight-asian="bold" style:font-weight-complex="bold"/>
    </style:style>
    <style:style style:name="T45" style:parent-style-name="DefaultParagraphFont" style:family="text">
      <style:text-properties style:font-name="Aptos"/>
    </style:style>
    <style:style style:name="P46" style:parent-style-name="Normal" style:list-style-name="LFO6" style:family="paragraph"/>
    <style:style style:name="T47" style:parent-style-name="DefaultParagraphFont" style:family="text">
      <style:text-properties style:font-name="Aptos" fo:font-weight="bold" style:font-weight-asian="bold" style:font-weight-complex="bold"/>
    </style:style>
    <style:style style:name="T48" style:parent-style-name="DefaultParagraphFont" style:family="text">
      <style:text-properties style:font-name="Aptos"/>
    </style:style>
    <style:style style:name="P49" style:parent-style-name="ListParagraph" style:list-style-name="LFO8" style:family="paragraph">
      <style:text-properties style:font-name="Aptos"/>
    </style:style>
    <style:style style:name="P50" style:parent-style-name="Normal" style:family="paragraph">
      <style:text-properties style:font-name="Aptos"/>
    </style:style>
    <style:style style:name="T51" style:parent-style-name="DefaultParagraphFont" style:family="text">
      <style:text-properties style:font-name="Aptos"/>
    </style:style>
    <style:style style:name="T52" style:parent-style-name="DefaultParagraphFont" style:family="text">
      <style:text-properties style:font-name="Aptos" fo:font-weight="bold" style:font-weight-asian="bold" style:font-weight-complex="bold"/>
    </style:style>
    <style:style style:name="T53" style:parent-style-name="DefaultParagraphFont" style:family="text">
      <style:text-properties style:font-name="Aptos"/>
    </style:style>
    <style:style style:name="P54" style:parent-style-name="Normal" style:family="paragraph">
      <style:text-properties style:font-name="Aptos"/>
    </style:style>
    <style:style style:name="P55" style:parent-style-name="ListParagraph" style:list-style-name="LFO8" style:family="paragraph">
      <style:text-properties style:font-name="Aptos"/>
    </style:style>
    <style:style style:name="P56" style:parent-style-name="Normal" style:family="paragraph">
      <style:text-properties style:font-name="Aptos"/>
    </style:style>
    <style:style style:name="T57" style:parent-style-name="DefaultParagraphFont" style:family="text">
      <style:text-properties style:font-name="Aptos" fo:font-weight="bold" style:font-weight-asian="bold" style:font-weight-complex="bold"/>
    </style:style>
    <style:style style:name="T58" style:parent-style-name="DefaultParagraphFont" style:family="text">
      <style:text-properties style:font-name="Aptos"/>
    </style:style>
    <style:style style:name="T59" style:parent-style-name="DefaultParagraphFont" style:family="text">
      <style:text-properties style:font-name="Aptos" fo:font-weight="bold" style:font-weight-asian="bold" style:font-weight-complex="bold"/>
    </style:style>
    <style:style style:name="T60" style:parent-style-name="DefaultParagraphFont" style:family="text">
      <style:text-properties style:font-name="Aptos"/>
    </style:style>
    <style:style style:name="P61" style:parent-style-name="Normal" style:family="paragraph">
      <style:text-properties style:font-name="Aptos"/>
    </style:style>
    <style:style style:name="P62" style:parent-style-name="ListParagraph" style:list-style-name="LFO8" style:family="paragraph">
      <style:text-properties style:font-name="Aptos"/>
    </style:style>
    <style:style style:name="T63" style:parent-style-name="DefaultParagraphFont" style:family="text">
      <style:text-properties style:font-name="Aptos" fo:font-weight="bold" style:font-weight-asian="bold" style:font-weight-complex="bold"/>
    </style:style>
    <style:style style:name="T64" style:parent-style-name="DefaultParagraphFont" style:family="text">
      <style:text-properties style:font-name="Aptos"/>
    </style:style>
    <style:style style:name="T65" style:parent-style-name="DefaultParagraphFont" style:family="text">
      <style:text-properties style:font-name="Aptos" fo:font-weight="bold" style:font-weight-asian="bold" style:font-weight-complex="bold"/>
    </style:style>
    <style:style style:name="T66" style:parent-style-name="DefaultParagraphFont" style:family="text">
      <style:text-properties style:font-name="Aptos"/>
    </style:style>
    <style:style style:name="T67" style:parent-style-name="DefaultParagraphFont" style:family="text">
      <style:text-properties style:font-name="Aptos" fo:font-weight="bold" style:font-weight-asian="bold" style:font-weight-complex="bold"/>
    </style:style>
    <style:style style:name="T68" style:parent-style-name="DefaultParagraphFont" style:family="text">
      <style:text-properties style:font-name="Aptos"/>
    </style:style>
    <style:style style:name="P69" style:parent-style-name="ListParagraph" style:family="paragraph">
      <style:text-properties style:font-name="Aptos"/>
    </style:style>
    <style:style style:name="P70" style:parent-style-name="ListParagraph" style:family="paragraph">
      <style:text-properties style:font-name="Aptos"/>
    </style:style>
    <style:style style:name="P71" style:parent-style-name="ListParagraph" style:list-style-name="LFO8" style:family="paragraph">
      <style:text-properties style:font-name="Aptos"/>
    </style:style>
    <style:style style:name="P72" style:parent-style-name="Normal" style:family="paragraph">
      <style:text-properties style:font-name="Aptos"/>
    </style:style>
    <style:style style:name="T73" style:parent-style-name="DefaultParagraphFont" style:family="text">
      <style:text-properties style:font-name="Aptos" fo:font-weight="bold" style:font-weight-asian="bold" style:font-weight-complex="bold"/>
    </style:style>
    <style:style style:name="T74" style:parent-style-name="DefaultParagraphFont" style:family="text">
      <style:text-properties style:font-name="Aptos"/>
    </style:style>
    <style:style style:name="T75" style:parent-style-name="DefaultParagraphFont" style:family="text">
      <style:text-properties style:font-name="Aptos" fo:font-weight="bold" style:font-weight-asian="bold" style:font-weight-complex="bold"/>
    </style:style>
    <style:style style:name="T76" style:parent-style-name="DefaultParagraphFont" style:family="text">
      <style:text-properties style:font-name="Aptos"/>
    </style:style>
    <style:style style:name="P77" style:parent-style-name="ListParagraph" style:family="paragraph">
      <style:text-properties style:font-name="Aptos"/>
    </style:style>
    <style:style style:name="P78" style:parent-style-name="ListParagraph" style:list-style-name="LFO8" style:family="paragraph">
      <style:text-properties style:font-name="Aptos"/>
    </style:style>
    <style:style style:name="T79" style:parent-style-name="DefaultParagraphFont" style:family="text">
      <style:text-properties style:font-name="Aptos"/>
    </style:style>
    <style:style style:name="T80" style:parent-style-name="DefaultParagraphFont" style:family="text">
      <style:text-properties style:font-name="Aptos" fo:font-weight="bold" style:font-weight-asian="bold" style:font-weight-complex="bold"/>
    </style:style>
    <style:style style:name="T81" style:parent-style-name="DefaultParagraphFont" style:family="text">
      <style:text-properties style:font-name="Aptos"/>
    </style:style>
    <style:style style:name="P82" style:parent-style-name="Normal" style:family="paragraph">
      <style:text-properties style:font-name="Aptos"/>
    </style:style>
    <style:style style:name="P83" style:parent-style-name="Normal" style:family="paragraph">
      <style:text-properties style:font-name="Aptos"/>
    </style:style>
    <style:style style:name="P84" style:parent-style-name="ListParagraph" style:family="paragraph">
      <style:text-properties style:font-name="Aptos"/>
    </style:style>
    <style:style style:name="P85" style:parent-style-name="Normal" style:family="paragraph">
      <style:text-properties style:font-name="Aptos"/>
    </style:style>
    <style:style style:name="P86" style:parent-style-name="Normal" style:family="paragraph">
      <style:text-properties style:font-name="Aptos"/>
    </style:style>
    <style:style style:name="P87" style:parent-style-name="ListParagraph" style:list-style-name="LFO2" style:family="paragraph">
      <style:text-properties style:font-name="Aptos"/>
    </style:style>
    <style:style style:name="P88" style:parent-style-name="ListParagraph" style:family="paragraph">
      <style:text-properties style:font-name="Aptos"/>
    </style:style>
    <style:style style:name="P89" style:parent-style-name="ListParagraph" style:family="paragraph">
      <style:text-properties style:font-name="Aptos"/>
    </style:style>
    <style:style style:name="P90" style:parent-style-name="ListParagraph" style:family="paragraph">
      <style:text-properties style:font-name="Aptos"/>
    </style:style>
    <style:style style:name="P91" style:parent-style-name="ListParagraph" style:family="paragraph">
      <style:text-properties style:font-name="Aptos"/>
    </style:style>
    <style:style style:name="P92" style:parent-style-name="ListParagraph" style:family="paragraph">
      <style:text-properties style:font-name="Aptos"/>
    </style:style>
    <style:style style:name="P93" style:parent-style-name="ListParagraph" style:family="paragraph">
      <style:text-properties style:font-name="Aptos"/>
    </style:style>
    <style:style style:name="P94" style:parent-style-name="ListParagraph" style:family="paragraph">
      <style:text-properties style:font-name="Aptos"/>
    </style:style>
    <style:style style:name="P95" style:parent-style-name="ListParagraph" style:family="paragraph">
      <style:text-properties style:font-name="Aptos"/>
    </style:style>
    <style:style style:name="T96" style:parent-style-name="DefaultParagraphFont" style:family="text">
      <style:text-properties style:font-name="Aptos"/>
    </style:style>
    <style:style style:name="T97" style:parent-style-name="DefaultParagraphFont" style:family="text">
      <style:text-properties style:font-name="Aptos"/>
    </style:style>
    <style:style style:name="T98" style:parent-style-name="DefaultParagraphFont" style:family="text">
      <style:text-properties style:font-name="Aptos"/>
    </style:style>
    <style:style style:name="T99" style:parent-style-name="DefaultParagraphFont" style:family="text">
      <style:text-properties style:font-name="Aptos"/>
    </style:style>
    <style:style style:name="T100" style:parent-style-name="DefaultParagraphFont" style:family="text">
      <style:text-properties style:font-name="Aptos"/>
    </style:style>
    <style:style style:name="T101" style:parent-style-name="DefaultParagraphFont" style:family="text">
      <style:text-properties style:font-name="Aptos"/>
    </style:style>
    <style:style style:name="P102" style:parent-style-name="ListParagraph" style:family="paragraph">
      <style:text-properties style:font-name="Aptos"/>
    </style:style>
    <style:style style:name="P103" style:parent-style-name="ListParagraph" style:family="paragraph">
      <style:text-properties style:font-name="Aptos"/>
    </style:style>
    <style:style style:name="P104" style:parent-style-name="ListParagraph" style:family="paragraph">
      <style:text-properties style:font-name="Aptos"/>
    </style:style>
    <style:style style:name="P105" style:parent-style-name="ListParagraph" style:family="paragraph">
      <style:text-properties style:font-name="Aptos"/>
    </style:style>
    <style:style style:name="P106" style:parent-style-name="ListParagraph" style:family="paragraph">
      <style:text-properties style:font-name="Aptos"/>
    </style:style>
    <style:style style:name="P107" style:parent-style-name="ListParagraph" style:family="paragraph">
      <style:text-properties style:font-name="Aptos"/>
    </style:style>
    <style:style style:name="P108" style:parent-style-name="ListParagraph" style:family="paragraph">
      <style:text-properties style:font-name="Aptos"/>
    </style:style>
    <style:style style:name="P109" style:parent-style-name="ListParagraph" style:family="paragraph">
      <style:text-properties style:font-name="Aptos"/>
    </style:style>
    <style:style style:name="P110" style:parent-style-name="ListParagraph" style:family="paragraph">
      <style:text-properties style:font-name="Aptos"/>
    </style:style>
    <style:style style:name="P111" style:parent-style-name="ListParagraph" style:family="paragraph">
      <style:text-properties style:font-name="Aptos"/>
    </style:style>
    <style:style style:name="P112" style:parent-style-name="ListParagraph" style:family="paragraph">
      <style:text-properties style:font-name="Aptos"/>
    </style:style>
    <style:style style:name="P113" style:parent-style-name="ListParagraph" style:family="paragraph">
      <style:text-properties style:font-name="Aptos"/>
    </style:style>
    <style:style style:name="P114" style:parent-style-name="ListParagraph" style:family="paragraph">
      <style:text-properties style:font-name="Aptos"/>
    </style:style>
    <style:style style:name="P115" style:parent-style-name="ListParagraph" style:family="paragraph">
      <style:text-properties style:font-name="Aptos"/>
    </style:style>
    <style:style style:name="P116" style:parent-style-name="ListParagraph" style:family="paragraph">
      <style:text-properties style:font-name="Aptos"/>
    </style:style>
    <style:style style:name="P117" style:parent-style-name="ListParagraph" style:family="paragraph">
      <style:text-properties style:font-name="Aptos"/>
    </style:style>
    <style:style style:name="P118" style:parent-style-name="ListParagraph" style:family="paragraph">
      <style:text-properties style:font-name="Aptos"/>
    </style:style>
    <style:style style:name="P119" style:parent-style-name="ListParagraph" style:family="paragraph">
      <style:text-properties style:font-name="Aptos"/>
    </style:style>
    <style:style style:name="P120" style:parent-style-name="ListParagraph" style:family="paragraph">
      <style:text-properties style:font-name="Aptos"/>
    </style:style>
    <style:style style:name="P121" style:parent-style-name="ListParagraph" style:family="paragraph">
      <style:text-properties style:font-name="Aptos"/>
    </style:style>
    <style:style style:name="P122" style:parent-style-name="ListParagraph" style:family="paragraph">
      <style:text-properties style:font-name="Aptos"/>
    </style:style>
    <style:style style:name="P123" style:parent-style-name="ListParagraph" style:family="paragraph">
      <style:text-properties style:font-name="Aptos"/>
    </style:style>
    <style:style style:name="P124" style:parent-style-name="ListParagraph" style:family="paragraph">
      <style:text-properties style:font-name="Aptos"/>
    </style:style>
    <style:style style:name="P125" style:parent-style-name="ListParagraph" style:family="paragraph">
      <style:text-properties style:font-name="Aptos"/>
    </style:style>
    <style:style style:name="P126" style:parent-style-name="ListParagraph" style:family="paragraph">
      <style:text-properties style:font-name="Aptos"/>
    </style:style>
    <style:style style:name="P127" style:parent-style-name="ListParagraph" style:family="paragraph">
      <style:text-properties style:font-name="Aptos"/>
    </style:style>
    <style:style style:name="P128" style:parent-style-name="ListParagraph" style:family="paragraph">
      <style:text-properties style:font-name="Aptos"/>
    </style:style>
    <style:style style:name="P129" style:parent-style-name="ListParagraph" style:family="paragraph">
      <style:text-properties style:font-name="Aptos"/>
    </style:style>
    <style:style style:name="P130" style:parent-style-name="ListParagraph" style:family="paragraph">
      <style:text-properties style:font-name="Aptos"/>
    </style:style>
    <style:style style:name="P131" style:parent-style-name="ListParagraph" style:family="paragraph">
      <style:text-properties style:font-name="Aptos"/>
    </style:style>
    <style:style style:name="P132" style:parent-style-name="ListParagraph" style:family="paragraph">
      <style:text-properties style:font-name="Aptos"/>
    </style:style>
    <style:style style:name="T133" style:parent-style-name="DefaultParagraphFont" style:family="text">
      <style:text-properties style:font-name="Aptos"/>
    </style:style>
    <style:style style:name="T134" style:parent-style-name="DefaultParagraphFont" style:family="text">
      <style:text-properties style:font-name="Aptos"/>
    </style:style>
    <style:style style:name="T135" style:parent-style-name="DefaultParagraphFont" style:family="text">
      <style:text-properties style:font-name="Aptos"/>
    </style:style>
    <style:style style:name="P136" style:parent-style-name="ListParagraph" style:family="paragraph">
      <style:text-properties style:font-name="Aptos"/>
    </style:style>
    <style:style style:name="P137" style:parent-style-name="ListParagraph" style:family="paragraph">
      <style:text-properties style:font-name="Aptos"/>
    </style:style>
    <style:style style:name="P138" style:parent-style-name="ListParagraph" style:family="paragraph">
      <style:text-properties style:font-name="Aptos"/>
    </style:style>
    <style:style style:name="P139" style:parent-style-name="ListParagraph" style:family="paragraph">
      <style:text-properties style:font-name="Aptos"/>
    </style:style>
    <style:style style:name="P140" style:parent-style-name="ListParagraph" style:family="paragraph">
      <style:text-properties style:font-name="Aptos"/>
    </style:style>
    <style:style style:name="P141" style:parent-style-name="ListParagraph" style:list-style-name="LFO2" style:family="paragraph">
      <style:text-properties style:font-name="Aptos"/>
    </style:style>
    <style:style style:name="P142" style:parent-style-name="Normal" style:family="paragraph">
      <style:text-properties style:font-name="Aptos"/>
    </style:style>
    <style:style style:name="P143" style:parent-style-name="Normal" style:family="paragraph">
      <style:text-properties style:font-name="Aptos"/>
    </style:style>
    <style:style style:name="P144" style:parent-style-name="Normal" style:family="paragraph">
      <style:text-properties style:font-name="Aptos"/>
    </style:style>
    <style:style style:name="P145" style:parent-style-name="Normal" style:family="paragraph">
      <style:text-properties style:font-name="Aptos"/>
    </style:style>
    <style:style style:name="P146" style:parent-style-name="Normal" style:family="paragraph">
      <style:text-properties style:font-name="Aptos"/>
    </style:style>
    <style:style style:name="P147" style:parent-style-name="Normal" style:family="paragraph">
      <style:text-properties style:font-name="Aptos"/>
    </style:style>
    <style:style style:name="P148" style:parent-style-name="Normal" style:family="paragraph">
      <style:text-properties style:font-name="Aptos"/>
    </style:style>
    <style:style style:name="P149" style:parent-style-name="Normal" style:family="paragraph">
      <style:text-properties style:font-name="Aptos"/>
    </style:style>
    <style:style style:name="P150" style:parent-style-name="Normal" style:family="paragraph">
      <style:text-properties style:font-name="Aptos"/>
    </style:style>
    <style:style style:name="P151" style:parent-style-name="Normal" style:family="paragraph">
      <style:text-properties style:font-name="Aptos"/>
    </style:style>
    <style:style style:name="P152" style:parent-style-name="Normal" style:family="paragraph">
      <style:text-properties style:font-name="Aptos"/>
    </style:style>
    <style:style style:name="P153" style:parent-style-name="Normal" style:family="paragraph">
      <style:text-properties style:font-name="Aptos"/>
    </style:style>
    <style:style style:name="P154" style:parent-style-name="Normal" style:family="paragraph">
      <style:text-properties style:font-name="Aptos"/>
    </style:style>
    <style:style style:name="P155" style:parent-style-name="Normal" style:family="paragraph">
      <style:text-properties style:font-name="Aptos"/>
    </style:style>
    <style:style style:name="P156" style:parent-style-name="Normal" style:family="paragraph">
      <style:text-properties style:font-name="Aptos"/>
    </style:style>
    <style:style style:name="P157" style:parent-style-name="Normal" style:family="paragraph">
      <style:text-properties style:font-name="Aptos"/>
    </style:style>
    <style:style style:name="P158" style:parent-style-name="Normal" style:family="paragraph">
      <style:text-properties style:font-name="Aptos"/>
    </style:style>
    <style:style style:name="P159" style:parent-style-name="Normal" style:family="paragraph">
      <style:text-properties style:font-name="Aptos"/>
    </style:style>
    <style:style style:name="P160" style:parent-style-name="Normal" style:family="paragraph">
      <style:text-properties style:font-name="Aptos"/>
    </style:style>
    <style:style style:name="P161" style:parent-style-name="Normal" style:family="paragraph">
      <style:text-properties style:font-name="Aptos"/>
    </style:style>
    <style:style style:name="P162" style:parent-style-name="Normal" style:family="paragraph">
      <style:text-properties style:font-name="Aptos"/>
    </style:style>
    <style:style style:name="P163" style:parent-style-name="Normal" style:family="paragraph">
      <style:text-properties style:font-name="Aptos"/>
    </style:style>
    <style:style style:name="P164" style:parent-style-name="Normal" style:family="paragraph">
      <style:text-properties style:font-name="Aptos"/>
    </style:style>
    <style:style style:name="P165" style:parent-style-name="Normal" style:family="paragraph">
      <style:text-properties style:font-name="Aptos"/>
    </style:style>
    <style:style style:name="P166" style:parent-style-name="ListParagraph" style:list-style-name="LFO2" style:family="paragraph">
      <style:text-properties style:font-name="Aptos"/>
    </style:style>
    <style:style style:name="P167" style:parent-style-name="Normal" style:family="paragraph">
      <style:text-properties style:font-name="Aptos"/>
    </style:style>
    <style:style style:name="P168" style:parent-style-name="Normal" style:family="paragraph">
      <style:text-properties style:font-name="Aptos"/>
    </style:style>
    <style:style style:name="P169" style:parent-style-name="Normal" style:family="paragraph">
      <style:text-properties style:font-name="Aptos"/>
    </style:style>
    <style:style style:name="P170" style:parent-style-name="Normal" style:family="paragraph">
      <style:text-properties style:font-name="Aptos"/>
    </style:style>
    <style:style style:name="P171" style:parent-style-name="Normal" style:family="paragraph">
      <style:text-properties style:font-name="Aptos"/>
    </style:style>
    <style:style style:name="P172" style:parent-style-name="Normal" style:family="paragraph">
      <style:text-properties style:font-name="Aptos"/>
    </style:style>
    <style:style style:name="P173" style:parent-style-name="Normal" style:family="paragraph">
      <style:text-properties style:font-name="Aptos"/>
    </style:style>
    <style:style style:name="P174" style:parent-style-name="Normal" style:family="paragraph">
      <style:text-properties style:font-name="Aptos"/>
    </style:style>
    <style:style style:name="P175" style:parent-style-name="Normal" style:family="paragraph">
      <style:text-properties style:font-name="Aptos"/>
    </style:style>
    <style:style style:name="P176" style:parent-style-name="Normal" style:family="paragraph">
      <style:text-properties style:font-name="Aptos"/>
    </style:style>
    <style:style style:name="P177" style:parent-style-name="Normal" style:family="paragraph">
      <style:text-properties style:font-name="Aptos"/>
    </style:style>
    <style:style style:name="P178" style:parent-style-name="Normal" style:family="paragraph">
      <style:text-properties style:font-name="Aptos"/>
    </style:style>
    <style:style style:name="P179" style:parent-style-name="Normal" style:family="paragraph">
      <style:text-properties style:font-name="Aptos"/>
    </style:style>
    <style:style style:name="P180" style:parent-style-name="Normal" style:family="paragraph">
      <style:text-properties style:font-name="Aptos"/>
    </style:style>
    <style:style style:name="P181" style:parent-style-name="Normal" style:family="paragraph">
      <style:text-properties style:font-name="Aptos"/>
    </style:style>
    <style:style style:name="P182" style:parent-style-name="Normal" style:family="paragraph">
      <style:text-properties style:font-name="Aptos"/>
    </style:style>
    <style:style style:name="P183" style:parent-style-name="Normal" style:family="paragraph">
      <style:text-properties style:font-name="Aptos"/>
    </style:style>
    <style:style style:name="P184" style:parent-style-name="Normal" style:family="paragraph">
      <style:text-properties style:font-name="Aptos"/>
    </style:style>
    <style:style style:name="P185" style:parent-style-name="Normal" style:family="paragraph">
      <style:text-properties style:font-name="Aptos"/>
    </style:style>
    <style:style style:name="P186" style:parent-style-name="Normal" style:family="paragraph">
      <style:text-properties style:font-name="Aptos"/>
    </style:style>
    <style:style style:name="P187" style:parent-style-name="Normal" style:family="paragraph">
      <style:text-properties style:font-name="Aptos"/>
    </style:style>
    <style:style style:name="P188" style:parent-style-name="Normal" style:family="paragraph">
      <style:text-properties style:font-name="Aptos"/>
    </style:style>
    <style:style style:name="P189" style:parent-style-name="Normal" style:family="paragraph">
      <style:text-properties style:font-name="Aptos"/>
    </style:style>
    <style:style style:name="P190" style:parent-style-name="Normal" style:family="paragraph">
      <style:text-properties style:font-name="Aptos"/>
    </style:style>
    <style:style style:name="P191" style:parent-style-name="Normal" style:family="paragraph">
      <style:text-properties style:font-name="Aptos"/>
    </style:style>
    <style:style style:name="P192" style:parent-style-name="Normal" style:family="paragraph">
      <style:text-properties style:font-name="Aptos"/>
    </style:style>
    <style:style style:name="P193" style:parent-style-name="Normal" style:family="paragraph">
      <style:text-properties style:font-name="Aptos"/>
    </style:style>
    <style:style style:name="P194" style:parent-style-name="Normal" style:family="paragraph">
      <style:text-properties style:font-name="Aptos"/>
    </style:style>
    <style:style style:name="P195" style:parent-style-name="Normal" style:family="paragraph">
      <style:text-properties style:font-name="Aptos"/>
    </style:style>
    <style:style style:name="P196" style:parent-style-name="Normal" style:family="paragraph">
      <style:text-properties style:font-name="Aptos"/>
    </style:style>
    <style:style style:name="P197" style:parent-style-name="Normal" style:family="paragraph">
      <style:text-properties style:font-name="Aptos"/>
    </style:style>
    <style:style style:name="P198" style:parent-style-name="Normal" style:family="paragraph">
      <style:text-properties style:font-name="Aptos"/>
    </style:style>
    <style:style style:name="P199" style:parent-style-name="Normal" style:family="paragraph">
      <style:text-properties style:font-name="Aptos"/>
    </style:style>
    <style:style style:name="P200" style:parent-style-name="Normal" style:family="paragraph">
      <style:text-properties style:font-name="Aptos"/>
    </style:style>
    <style:style style:name="P201" style:parent-style-name="ListParagraph" style:list-style-name="LFO2" style:family="paragraph">
      <style:text-properties style:font-name="Aptos"/>
    </style:style>
    <style:style style:name="P202" style:parent-style-name="Normal" style:family="paragraph">
      <style:text-properties style:font-name="Aptos"/>
    </style:style>
    <style:style style:name="P203" style:parent-style-name="Normal" style:family="paragraph">
      <style:text-properties style:font-name="Aptos"/>
    </style:style>
    <style:style style:name="P204" style:parent-style-name="Normal" style:family="paragraph">
      <style:text-properties style:font-name="Aptos"/>
    </style:style>
    <style:style style:name="P205" style:parent-style-name="Normal" style:family="paragraph">
      <style:text-properties style:font-name="Aptos"/>
    </style:style>
    <style:style style:name="P206" style:parent-style-name="Normal" style:family="paragraph">
      <style:text-properties style:font-name="Aptos"/>
    </style:style>
    <style:style style:name="P207" style:parent-style-name="Normal" style:family="paragraph">
      <style:text-properties style:font-name="Aptos"/>
    </style:style>
    <style:style style:name="P208" style:parent-style-name="Normal" style:family="paragraph">
      <style:text-properties style:font-name="Aptos"/>
    </style:style>
    <style:style style:name="P209" style:parent-style-name="Normal" style:family="paragraph">
      <style:text-properties style:font-name="Aptos"/>
    </style:style>
    <style:style style:name="P210" style:parent-style-name="Normal" style:family="paragraph">
      <style:text-properties style:font-name="Aptos"/>
    </style:style>
    <style:style style:name="P211" style:parent-style-name="Normal" style:family="paragraph">
      <style:text-properties style:font-name="Aptos"/>
    </style:style>
    <style:style style:name="P212" style:parent-style-name="Normal" style:family="paragraph">
      <style:text-properties style:font-name="Aptos"/>
    </style:style>
    <style:style style:name="P213" style:parent-style-name="Normal" style:family="paragraph">
      <style:text-properties style:font-name="Aptos"/>
    </style:style>
    <style:style style:name="P214" style:parent-style-name="Normal" style:family="paragraph">
      <style:text-properties style:font-name="Aptos"/>
    </style:style>
    <style:style style:name="P215" style:parent-style-name="Normal" style:family="paragraph">
      <style:text-properties style:font-name="Aptos"/>
    </style:style>
    <style:style style:name="P216" style:parent-style-name="Normal" style:family="paragraph">
      <style:text-properties style:font-name="Aptos"/>
    </style:style>
    <style:style style:name="P217" style:parent-style-name="Normal" style:family="paragraph">
      <style:text-properties style:font-name="Aptos"/>
    </style:style>
    <style:style style:name="P218" style:parent-style-name="Normal" style:family="paragraph">
      <style:text-properties style:font-name="Aptos"/>
    </style:style>
    <style:style style:name="P219" style:parent-style-name="Normal" style:family="paragraph">
      <style:text-properties style:font-name="Aptos"/>
    </style:style>
    <style:style style:name="P220" style:parent-style-name="Normal" style:family="paragraph">
      <style:text-properties style:font-name="Aptos"/>
    </style:style>
    <style:style style:name="P221" style:parent-style-name="Normal" style:family="paragraph">
      <style:text-properties style:font-name="Aptos"/>
    </style:style>
    <style:style style:name="P222" style:parent-style-name="Normal" style:family="paragraph">
      <style:text-properties style:font-name="Aptos"/>
    </style:style>
    <style:style style:name="P223" style:parent-style-name="Normal" style:family="paragraph">
      <style:text-properties style:font-name="Aptos"/>
    </style:style>
    <style:style style:name="P224" style:parent-style-name="Normal" style:family="paragraph">
      <style:text-properties style:font-name="Aptos"/>
    </style:style>
    <style:style style:name="P225" style:parent-style-name="Normal" style:family="paragraph">
      <style:text-properties style:font-name="Aptos"/>
    </style:style>
    <style:style style:name="P226" style:parent-style-name="Normal" style:family="paragraph">
      <style:text-properties style:font-name="Aptos"/>
    </style:style>
    <style:style style:name="P227" style:parent-style-name="Normal" style:family="paragraph">
      <style:text-properties style:font-name="Aptos"/>
    </style:style>
    <style:style style:name="P228" style:parent-style-name="Normal" style:family="paragraph">
      <style:text-properties style:font-name="Aptos"/>
    </style:style>
    <style:style style:name="P229" style:parent-style-name="Normal" style:family="paragraph">
      <style:text-properties style:font-name="Aptos"/>
    </style:style>
    <style:style style:name="P230" style:parent-style-name="Normal" style:family="paragraph">
      <style:text-properties style:font-name="Aptos"/>
    </style:style>
    <style:style style:name="P231" style:parent-style-name="Normal" style:family="paragraph">
      <style:text-properties style:font-name="Aptos"/>
    </style:style>
    <style:style style:name="P232" style:parent-style-name="Normal" style:family="paragraph">
      <style:text-properties style:font-name="Aptos"/>
    </style:style>
    <style:style style:name="P233" style:parent-style-name="Normal" style:family="paragraph">
      <style:text-properties style:font-name="Aptos"/>
    </style:style>
    <style:style style:name="P234" style:parent-style-name="Normal" style:family="paragraph">
      <style:text-properties style:font-name="Aptos"/>
    </style:style>
    <style:style style:name="P235" style:parent-style-name="Normal" style:family="paragraph">
      <style:text-properties style:font-name="Aptos"/>
    </style:style>
    <style:style style:name="P236" style:parent-style-name="Normal" style:family="paragraph">
      <style:text-properties style:font-name="Aptos"/>
    </style:style>
    <style:style style:name="P237" style:parent-style-name="Normal" style:family="paragraph">
      <style:text-properties style:font-name="Aptos"/>
    </style:style>
    <style:style style:name="P238" style:parent-style-name="Normal" style:family="paragraph">
      <style:text-properties style:font-name="Aptos"/>
    </style:style>
    <style:style style:name="P239" style:parent-style-name="Normal" style:family="paragraph">
      <style:text-properties style:font-name="Aptos"/>
    </style:style>
    <style:style style:name="P240" style:parent-style-name="Normal" style:family="paragraph">
      <style:text-properties style:font-name="Aptos"/>
    </style:style>
    <style:style style:name="P241" style:parent-style-name="Normal" style:family="paragraph">
      <style:text-properties style:font-name="Aptos"/>
    </style:style>
    <style:style style:name="P242" style:parent-style-name="Normal" style:family="paragraph">
      <style:text-properties style:font-name="Aptos"/>
    </style:style>
    <style:style style:name="P243" style:parent-style-name="Normal" style:family="paragraph">
      <style:text-properties style:font-name="Aptos"/>
    </style:style>
    <style:style style:name="P244" style:parent-style-name="Normal" style:family="paragraph">
      <style:text-properties style:font-name="Aptos"/>
    </style:style>
    <style:style style:name="P245" style:parent-style-name="Normal" style:family="paragraph">
      <style:text-properties style:font-name="Aptos"/>
    </style:style>
    <style:style style:name="P246" style:parent-style-name="Normal" style:family="paragraph">
      <style:text-properties style:font-name="Aptos"/>
    </style:style>
    <style:style style:name="P247" style:parent-style-name="Normal" style:family="paragraph">
      <style:text-properties style:font-name="Aptos"/>
    </style:style>
    <style:style style:name="P248" style:parent-style-name="Normal" style:family="paragraph">
      <style:text-properties style:font-name="Aptos"/>
    </style:style>
    <style:style style:name="P249" style:parent-style-name="Normal" style:family="paragraph">
      <style:text-properties style:font-name="Aptos"/>
    </style:style>
    <style:style style:name="P250" style:parent-style-name="Normal" style:family="paragraph">
      <style:text-properties style:font-name="Aptos"/>
    </style:style>
    <style:style style:name="P251" style:parent-style-name="Normal" style:family="paragraph">
      <style:text-properties style:font-name="Aptos"/>
    </style:style>
    <style:style style:name="P252" style:parent-style-name="Normal" style:family="paragraph">
      <style:text-properties style:font-name="Aptos"/>
    </style:style>
    <style:style style:name="P253" style:parent-style-name="Normal" style:family="paragraph">
      <style:text-properties style:font-name="Aptos"/>
    </style:style>
    <style:style style:name="P254" style:parent-style-name="Normal" style:family="paragraph">
      <style:text-properties style:font-name="Aptos"/>
    </style:style>
    <style:style style:name="P255" style:parent-style-name="Normal" style:family="paragraph">
      <style:text-properties style:font-name="Aptos"/>
    </style:style>
    <style:style style:name="P256" style:parent-style-name="Normal" style:family="paragraph">
      <style:text-properties style:font-name="Aptos"/>
    </style:style>
    <style:style style:name="P257" style:parent-style-name="Normal" style:family="paragraph">
      <style:text-properties style:font-name="Aptos"/>
    </style:style>
    <style:style style:name="P258" style:parent-style-name="Normal" style:family="paragraph">
      <style:text-properties style:font-name="Aptos"/>
    </style:style>
    <style:style style:name="P259" style:parent-style-name="Normal" style:family="paragraph">
      <style:text-properties style:font-name="Aptos"/>
    </style:style>
    <style:style style:name="P260" style:parent-style-name="Normal" style:family="paragraph">
      <style:text-properties style:font-name="Aptos"/>
    </style:style>
    <style:style style:name="P261" style:parent-style-name="Normal" style:family="paragraph">
      <style:text-properties style:font-name="Aptos"/>
    </style:style>
    <style:style style:name="P262" style:parent-style-name="Normal" style:family="paragraph">
      <style:text-properties style:font-name="Aptos"/>
    </style:style>
    <style:style style:name="P263" style:parent-style-name="Normal" style:family="paragraph">
      <style:text-properties style:font-name="Aptos"/>
    </style:style>
    <style:style style:name="P264" style:parent-style-name="Normal" style:family="paragraph">
      <style:text-properties style:font-name="Aptos"/>
    </style:style>
    <style:style style:name="P265" style:parent-style-name="Normal" style:family="paragraph">
      <style:text-properties style:font-name="Aptos"/>
    </style:style>
    <style:style style:name="P266" style:parent-style-name="Normal" style:family="paragraph">
      <style:text-properties style:font-name="Aptos"/>
    </style:style>
    <style:style style:name="P267" style:parent-style-name="Normal" style:family="paragraph">
      <style:text-properties style:font-name="Aptos"/>
    </style:style>
    <style:style style:name="P268" style:parent-style-name="Normal" style:family="paragraph">
      <style:text-properties style:font-name="Aptos"/>
    </style:style>
    <style:style style:name="P269" style:parent-style-name="Normal" style:family="paragraph">
      <style:text-properties style:font-name="Aptos"/>
    </style:style>
    <style:style style:name="P270" style:parent-style-name="Normal" style:family="paragraph">
      <style:text-properties style:font-name="Aptos"/>
    </style:style>
    <style:style style:name="P271" style:parent-style-name="Normal" style:family="paragraph">
      <style:text-properties style:font-name="Aptos"/>
    </style:style>
    <style:style style:name="P272" style:parent-style-name="Normal" style:family="paragraph">
      <style:text-properties style:font-name="Aptos"/>
    </style:style>
    <style:style style:name="P273" style:parent-style-name="Normal" style:family="paragraph">
      <style:text-properties style:font-name="Aptos"/>
    </style:style>
    <style:style style:name="P274" style:parent-style-name="Normal" style:family="paragraph">
      <style:text-properties style:font-name="Aptos"/>
    </style:style>
    <style:style style:name="P275" style:parent-style-name="Normal" style:family="paragraph">
      <style:text-properties style:font-name="Aptos"/>
    </style:style>
    <style:style style:name="P276" style:parent-style-name="Normal" style:family="paragraph">
      <style:text-properties style:font-name="Aptos"/>
    </style:style>
    <style:style style:name="P277" style:parent-style-name="Normal" style:family="paragraph">
      <style:text-properties style:font-name="Aptos"/>
    </style:style>
    <style:style style:name="P278" style:parent-style-name="Normal" style:family="paragraph">
      <style:text-properties style:font-name="Aptos"/>
    </style:style>
    <style:style style:name="P279" style:parent-style-name="Normal" style:family="paragraph">
      <style:text-properties style:font-name="Aptos"/>
    </style:style>
    <style:style style:name="P280" style:parent-style-name="Normal" style:family="paragraph">
      <style:text-properties style:font-name="Aptos"/>
    </style:style>
    <style:style style:name="P281" style:parent-style-name="Normal" style:family="paragraph">
      <style:text-properties style:font-name="Aptos"/>
    </style:style>
    <style:style style:name="P282" style:parent-style-name="Normal" style:family="paragraph">
      <style:text-properties style:font-name="Aptos"/>
    </style:style>
    <style:style style:name="P283" style:parent-style-name="Normal" style:family="paragraph">
      <style:text-properties style:font-name="Aptos"/>
    </style:style>
    <style:style style:name="P284" style:parent-style-name="Normal" style:family="paragraph">
      <style:text-properties style:font-name="Aptos"/>
    </style:style>
    <style:style style:name="P285" style:parent-style-name="Normal" style:family="paragraph">
      <style:text-properties style:font-name="Aptos"/>
    </style:style>
    <style:style style:name="P286" style:parent-style-name="Normal" style:family="paragraph">
      <style:text-properties style:font-name="Aptos"/>
    </style:style>
    <style:style style:name="P287" style:parent-style-name="Normal" style:family="paragraph">
      <style:text-properties style:font-name="Aptos"/>
    </style:style>
    <style:style style:name="P288" style:parent-style-name="Normal" style:family="paragraph">
      <style:text-properties style:font-name="Aptos"/>
    </style:style>
    <style:style style:name="P289" style:parent-style-name="Normal" style:family="paragraph">
      <style:text-properties style:font-name="Aptos"/>
    </style:style>
    <style:style style:name="P290" style:parent-style-name="Normal" style:family="paragraph">
      <style:text-properties style:font-name="Aptos"/>
    </style:style>
    <style:style style:name="P291" style:parent-style-name="Normal" style:family="paragraph">
      <style:text-properties style:font-name="Aptos"/>
    </style:style>
    <style:style style:name="P292" style:parent-style-name="Normal" style:family="paragraph">
      <style:text-properties style:font-name="Aptos"/>
    </style:style>
    <style:style style:name="P293" style:parent-style-name="Normal" style:family="paragraph">
      <style:text-properties style:font-name="Aptos"/>
    </style:style>
    <style:style style:name="P294" style:parent-style-name="Normal" style:family="paragraph">
      <style:text-properties style:font-name="Aptos"/>
    </style:style>
    <style:style style:name="P295" style:parent-style-name="Normal" style:family="paragraph">
      <style:text-properties style:font-name="Aptos"/>
    </style:style>
    <style:style style:name="P296" style:parent-style-name="Normal" style:family="paragraph">
      <style:text-properties style:font-name="Aptos"/>
    </style:style>
    <style:style style:name="P297" style:parent-style-name="Normal" style:family="paragraph">
      <style:text-properties style:font-name="Aptos"/>
    </style:style>
    <style:style style:name="P298" style:parent-style-name="Normal" style:family="paragraph">
      <style:text-properties style:font-name="Aptos"/>
    </style:style>
    <style:style style:name="P299" style:parent-style-name="Normal" style:family="paragraph">
      <style:text-properties style:font-name="Aptos"/>
    </style:style>
    <style:style style:name="P300" style:parent-style-name="Normal" style:family="paragraph">
      <style:text-properties style:font-name="Aptos"/>
    </style:style>
    <style:style style:name="P301" style:parent-style-name="Normal" style:family="paragraph">
      <style:text-properties style:font-name="Aptos"/>
    </style:style>
    <style:style style:name="P302" style:parent-style-name="Normal" style:family="paragraph">
      <style:text-properties style:font-name="Aptos"/>
    </style:style>
    <style:style style:name="P303" style:parent-style-name="ListParagraph" style:list-style-name="LFO2" style:family="paragraph">
      <style:text-properties style:font-name="Aptos"/>
    </style:style>
    <style:style style:name="P304" style:parent-style-name="Normal" style:family="paragraph">
      <style:text-properties style:font-name="Aptos"/>
    </style:style>
    <style:style style:name="P305" style:parent-style-name="Normal" style:family="paragraph">
      <style:text-properties style:font-name="Aptos"/>
    </style:style>
    <style:style style:name="P306" style:parent-style-name="Normal" style:family="paragraph">
      <style:text-properties style:font-name="Aptos"/>
    </style:style>
    <style:style style:name="P307" style:parent-style-name="Normal" style:family="paragraph">
      <style:text-properties style:font-name="Aptos"/>
    </style:style>
    <style:style style:name="P308" style:parent-style-name="Normal" style:family="paragraph">
      <style:text-properties style:font-name="Aptos"/>
    </style:style>
    <style:style style:name="P309" style:parent-style-name="Normal" style:family="paragraph">
      <style:text-properties style:font-name="Aptos"/>
    </style:style>
    <style:style style:name="P310" style:parent-style-name="Normal" style:family="paragraph">
      <style:text-properties style:font-name="Aptos"/>
    </style:style>
    <style:style style:name="P311" style:parent-style-name="Normal" style:family="paragraph">
      <style:text-properties style:font-name="Aptos"/>
    </style:style>
    <style:style style:name="P312" style:parent-style-name="Normal" style:family="paragraph">
      <style:text-properties style:font-name="Aptos"/>
    </style:style>
    <style:style style:name="P313" style:parent-style-name="Normal" style:family="paragraph">
      <style:text-properties style:font-name="Aptos"/>
    </style:style>
    <style:style style:name="P314" style:parent-style-name="Normal" style:family="paragraph">
      <style:text-properties style:font-name="Aptos"/>
    </style:style>
    <style:style style:name="P315" style:parent-style-name="Normal" style:family="paragraph">
      <style:text-properties style:font-name="Aptos"/>
    </style:style>
    <style:style style:name="P316" style:parent-style-name="Normal" style:family="paragraph">
      <style:text-properties style:font-name="Aptos"/>
    </style:style>
    <style:style style:name="P317" style:parent-style-name="Normal" style:family="paragraph">
      <style:text-properties style:font-name="Aptos"/>
    </style:style>
    <style:style style:name="P318" style:parent-style-name="Normal" style:family="paragraph">
      <style:text-properties style:font-name="Aptos"/>
    </style:style>
    <style:style style:name="P319" style:parent-style-name="Normal" style:family="paragraph">
      <style:text-properties style:font-name="Aptos"/>
    </style:style>
    <style:style style:name="P320" style:parent-style-name="Normal" style:family="paragraph">
      <style:text-properties style:font-name="Aptos"/>
    </style:style>
    <style:style style:name="T321" style:parent-style-name="DefaultParagraphFont" style:family="text">
      <style:text-properties style:font-name="Aptos"/>
    </style:style>
    <style:style style:name="T322" style:parent-style-name="DefaultParagraphFont" style:family="text">
      <style:text-properties style:font-name="Aptos"/>
    </style:style>
    <style:style style:name="T323" style:parent-style-name="DefaultParagraphFont" style:family="text">
      <style:text-properties style:font-name="Aptos"/>
    </style:style>
    <style:style style:name="P324" style:parent-style-name="Normal" style:family="paragraph">
      <style:text-properties style:font-name="Aptos"/>
    </style:style>
    <style:style style:name="P325" style:parent-style-name="Normal" style:family="paragraph">
      <style:text-properties style:font-name="Aptos"/>
    </style:style>
    <style:style style:name="P326" style:parent-style-name="Normal" style:family="paragraph">
      <style:text-properties style:font-name="Aptos"/>
    </style:style>
    <style:style style:name="P327" style:parent-style-name="Normal" style:family="paragraph">
      <style:text-properties style:font-name="Aptos"/>
    </style:style>
    <style:style style:name="P328" style:parent-style-name="Normal" style:family="paragraph">
      <style:text-properties style:font-name="Aptos"/>
    </style:style>
    <style:style style:name="P329" style:parent-style-name="Normal" style:family="paragraph">
      <style:text-properties style:font-name="Aptos"/>
    </style:style>
    <style:style style:name="P330" style:parent-style-name="Normal" style:family="paragraph">
      <style:text-properties style:font-name="Aptos"/>
    </style:style>
    <style:style style:name="P331" style:parent-style-name="Normal" style:family="paragraph">
      <style:text-properties style:font-name="Aptos"/>
    </style:style>
    <style:style style:name="P332" style:parent-style-name="Normal" style:family="paragraph">
      <style:text-properties style:font-name="Apto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ANGUAGE ACADEMY PROJECT: MICROSOFT VISUAL STUDIO</text:p>
      <text:p text:style-name="Normal">NAME:<text:s/><text:span text:style-name="T2">DIANA LOUTFI CUCAKOVIC</text:span></text:p>
      <text:p text:style-name="Normal">STUDENT ID:<text:s/><text:span text:style-name="T3">45559</text:span></text:p>
      <text:p text:style-name="Normal"><text:span text:style-name="T4">Course name:<text:s/></text:span><text:span text:style-name="T5">Network Application Development</text:span></text:p>
      <text:p text:style-name="P6"/>
      <text:p text:style-name="Normal"/>
      <text:p text:style-name="Normal"/>
      <text:p text:style-name="P7">Project Documentation:</text:p>
      <text:list text:style-name="LFO8" text:continue-numbering="true">
        <text:list-item>
          <text:p text:style-name="P8">What is the Language Academy?</text:p>
        </text:list-item>
      </text:list>
      <text:p text:style-name="Normal"><text:span text:style-name="T9">. Language Academy:</text:span><text:span text:style-name="T10"><text:s/>is a modern, web-based educational metrics platform built specifically to catalog language training tracks, track course signups, and map metrics for educational institutions.<text:s/></text:span></text:p>
      <text:p text:style-name="P11">. It acts as an Administrative Management Hub to observe user success rates in real time.</text:p>
      <text:p text:style-name="Normal"/>
      <text:list text:style-name="LFO8" text:continue-numbering="true">
        <text:list-item>
          <text:p text:style-name="P12">Why is this system required?</text:p>
        </text:list-item>
      </text:list>
      <text:p text:style-name="P13">. Traditional learning platforms separate student registration numbers from performance analytics.<text:s/></text:p>
      <text:p text:style-name="P14">. This web application bridges the gap by housing administrative profiles, enrollment numbers, and graphical visual progress data within a singular standalone portal, reducing structural overhead.</text:p>
      <text:p text:style-name="P15"/>
      <text:list text:style-name="LFO8" text:continue-numbering="true">
        <text:list-item>
          <text:p text:style-name="P16">How is the platform executed?</text:p>
        </text:list-item>
      </text:list>
      <text:p text:style-name="Normal"><text:span text:style-name="T17">. The solution is deployed via an automated<text:s/></text:span><text:span text:style-name="T18">C# ASP.NET Core</text:span><text:span text:style-name="T19"><text:s/>engine utilizing built-in razor templates.<text:s/></text:span></text:p>
      <text:p text:style-name="P20">. Content rendering engine works by matching URL controller targets to visual files (.cshtml), avoiding browser-side processing lags.</text:p>
      <text:p text:style-name="P21"/>
      <text:list text:style-name="LFO8" text:continue-numbering="true">
        <text:list-item>
          <text:p text:style-name="P22">The Progress:</text:p>
        </text:list-item>
      </text:list>
      <text:p text:style-name="Normal"><text:span text:style-name="T23">. The current layout represents<text:s/></text:span><text:span text:style-name="T24">Milestone Phase 1</text:span><text:span text:style-name="T25">.<text:s/></text:span></text:p>
      <text:p text:style-name="P26">. In this stage, data routing pathways are entirely established; mock figures are successfully integrated into custom static datasets, and client-side dependencies are fetched automatically through fast CDN servers.</text:p>
      <text:p text:style-name="P27"/>
      <text:list text:style-name="LFO8" text:continue-numbering="true">
        <text:list-item>
          <text:p text:style-name="P28">The Data:</text:p>
        </text:list-item>
      </text:list>
      <text:p text:style-name="P29">The system maps two categories of mock dataset metrics:</text:p>
      <text:p text:style-name="ListParagraph"><text:span text:style-name="T30">Volumetric Enrollment Figures:</text:span><text:span text:style-name="T31"><text:s/>Tracks total enrollments ($1,248$ active accounts) subdivided into targeted tracks (English: $520$, Spanish: $340$, French: $210$, Japanese: $178$).</text:span></text:p>
      <text:p text:style-name="ListParagraph"><text:span text:style-name="T32">Qualitative Progression Ratios:</text:span><text:span text:style-name="T33"><text:s/>Displays singular evaluation score marks via status badges ($95\%$, $91\%$, $78\%$, $88\%$) mapped directly against real student profile parameters.</text:span></text:p>
      <text:p text:style-name="P34"/>
      <text:list text:style-name="LFO8" text:continue-numbering="true">
        <text:list-item>
          <text:p text:style-name="P35">THE ARCHITECTURE:</text:p>
        </text:list-item>
      </text:list>
      <text:p text:style-name="Normal"><draw:frame draw:style-name="a0" draw:name="drawing" text:anchor-type="as-char" svg:x="0in" svg:y="0in" svg:width="6.5in" svg:height="3.69792in" style:rel-width="scale" style:rel-height="scale"><draw:image xlink:href="media/image1.png" xlink:type="simple" xlink:show="embed" xlink:actuate="onLoad"/><svg:title/><svg:desc/></draw:frame></text:p>
      <text:p text:style-name="P36"/>
      <text:p text:style-name="Normal"><text:span text:style-name="T37">The architecture adheres strictly to the separation-of-concerns protocol defined by the<text:s/></text:span><text:span text:style-name="T38">Model-View-Controller (MVC)</text:span><text:span text:style-name="T39"><text:s/>structural blueprint:</text:span></text:p>
      <text:list text:style-name="LFO6" text:continue-numbering="true">
        <text:list-item>
          <text:p text:style-name="P40"><text:span text:style-name="T41">Models:</text:span><text:span text:style-name="T42"><text:s/>Houses internal entity declarations and language structural datasets.</text:span></text:p>
        </text:list-item>
        <text:list-item>
          <text:p text:style-name="P43"><text:span text:style-name="T44">Views:</text:span><text:span text:style-name="T45"><text:s/>Renders the layout schema interfaces, combining HTML5, customized CSS grids, and chart renderings.</text:span></text:p>
        </text:list-item>
        <text:list-item>
          <text:p text:style-name="P46"><text:span text:style-name="T47">Controllers:</text:span><text:span text:style-name="T48"><text:s/>Acts as the traffic router, intercepting requests and generating responsive views.</text:span></text:p>
        </text:list-item>
      </text:list>
      <text:list text:style-name="LFO8" text:continue-numbering="true">
        <text:list-item>
          <text:p text:style-name="P49">Where is the application compiled?</text:p>
        </text:list-item>
      </text:list>
      <text:p text:style-name="P50">. Compilation runs entirely locally in the Lenovo notebook workstation environment.<text:s/></text:p>
      <text:p text:style-name="Normal"><text:span text:style-name="T51">. The execution lifecycle begins within a full<text:s/></text:span><text:span text:style-name="T52">Microsoft Visual Studio</text:span><text:span text:style-name="T53"><text:s/>environment and executes in a sandboxed host browser framework.</text:span></text:p>
      <text:p text:style-name="P54"/>
      <text:list text:style-name="LFO8" text:continue-numbering="true">
        <text:list-item>
          <text:p text:style-name="P55">ASP.NET Features Utilized:</text:p>
        </text:list-item>
      </text:list>
      <text:p text:style-name="P56">The framework harnesses core high-speed features native to .NET web tools:</text:p>
      <text:p text:style-name="ListParagraph"><text:span text:style-name="T57">Tag Helpers:</text:span><text:span text:style-name="T58"><text:s/>Features such as asp-controller and asp-action ensure clean internal route link compilation.</text:span></text:p>
      <text:p text:style-name="ListParagraph"><text:span text:style-name="T59">Razor View Engine:</text:span><text:span text:style-name="T60"><text:s/>Seamlessly combines presentation markup templates directly with lightweight C# code blocks.</text:span></text:p>
      <text:p text:style-name="P61"/>
      <text:list text:style-name="LFO8" text:continue-numbering="true">
        <text:list-item>
          <text:p text:style-name="P62">The Strengths:</text:p>
        </text:list-item>
      </text:list>
      <text:p text:style-name="Normal"><text:span text:style-name="T63">Zero Resource Footprint:</text:span><text:span text:style-name="T64"><text:s/>Requires no database setups, third-party installation binaries, or system risks.</text:span></text:p>
      <text:p text:style-name="ListParagraph"><text:span text:style-name="T65">Clean Code Separation:</text:span><text:span text:style-name="T66"><text:s/>Clear controller-to-view alignment ensures adjustments can be safely updated without fracturing operational views.</text:span></text:p>
      <text:p text:style-name="ListParagraph"><text:span text:style-name="T67">Optimized Responsiveness:</text:span><text:span text:style-name="T68"><text:s/>Uses responsive styling configurations that auto-scale beautifully on desktop or small mobile screens.</text:span></text:p>
      <text:p text:style-name="P69"/>
      <text:p text:style-name="P70"/>
      <text:list text:style-name="LFO8" text:continue-numbering="true">
        <text:list-item>
          <text:p text:style-name="P71">Built-In Elements:</text:p>
        </text:list-item>
      </text:list>
      <text:p text:style-name="P72">The architecture leans fully on safe, universally recognized visual layouts and tools:</text:p>
      <text:p text:style-name="ListParagraph"><text:span text:style-name="T73">Bootstrap 5 Framework:</text:span><text:span text:style-name="T74"><text:s/>Implemented over standard CDN servers for layout grids, color palettes, badges, and card formatting.</text:span></text:p>
      <text:p text:style-name="ListParagraph"><text:span text:style-name="T75">ChartJS Library:</text:span><text:span text:style-name="T76"><text:s/>Standard script structures to render beautiful, dynamic visual calculations into vector graphs seamlessly.</text:span></text:p>
      <text:p text:style-name="P77"/>
      <text:list text:style-name="LFO8" text:continue-numbering="true">
        <text:list-item>
          <text:p text:style-name="P78">The Conclusion:</text:p>
        </text:list-item>
      </text:list>
      <text:p text:style-name="Normal"><text:span text:style-name="T79">. The<text:s/></text:span><text:span text:style-name="T80">Language Academy Platform</text:span><text:span text:style-name="T81"><text:s/>serves as an efficient proof-of-concept for an educational tracking system.<text:s/></text:span></text:p>
      <text:p text:style-name="P82">. Operating securely within your native Visual Studio environment without additional dependencies, it fulfills all design criteria, structural data reporting, and layout architecture goals cleanly and without risk.</text:p>
      <text:p text:style-name="P83"/>
      <text:p text:style-name="P84"/>
      <text:p text:style-name="P85">Microsoft studio codes:</text:p>
      <text:p text:style-name="P86"/>
      <text:list text:style-name="LFO2" text:continue-numbering="true">
        <text:list-item>
          <text:p text:style-name="P87">Layout code: (_Layout.cshtml)</text:p>
        </text:list-item>
      </text:list>
      <text:p text:style-name="P88"/>
      <text:p text:style-name="P89"/>
      <text:p text:style-name="P90">&lt;!DOCTYPE html&gt;</text:p>
      <text:p text:style-name="P91">&lt;html lang="en"&gt;</text:p>
      <text:p text:style-name="P92">&lt;head&gt;</text:p>
      <text:p text:style-name="P93"><text:s text:c="4"/>&lt;meta charset="utf-8" /&gt;</text:p>
      <text:p text:style-name="P94"><text:s text:c="4"/>&lt;meta name="viewport" content="width=device-width, initial-scale=1.0" /&gt;</text:p>
      <text:p text:style-name="P95"><text:s text:c="4"/>&lt;title&gt;@ViewData["Title"] - LanguageAcademy&lt;/title&gt;</text:p>
      <text:p text:style-name="ListParagraph"><text:span text:style-name="T96"><text:s text:c="4"/>&lt;link rel="stylesheet"<text:s/></text:span><text:a xlink:href="mailto:href=" office:target-frame-name="_top" xlink:show="replace"><text:span text:style-name="T97">href="https://cdn.jsdelivr.net/npm/bootstrap@5.3.0/dist/css/bootstrap.min.css</text:span></text:a><text:span text:style-name="T98">" /&gt;</text:span></text:p>
      <text:p text:style-name="ListParagraph"><text:span text:style-name="T99"><text:s text:c="4"/>&lt;link rel="stylesheet"<text:s/></text:span><text:a xlink:href="mailto:href=" office:target-frame-name="_top" xlink:show="replace"><text:span text:style-name="T100">href="https://cdn.jsdelivr.net/npm/bootstrap-icons@1.11.0/font/bootstrap-icons.css</text:span></text:a><text:span text:style-name="T101">"&gt;</text:span></text:p>
      <text:p text:style-name="P102">&lt;/head&gt;</text:p>
      <text:p text:style-name="P103">&lt;body class="bg-light"&gt;</text:p>
      <text:p text:style-name="P104"><text:s text:c="4"/>&lt;header&gt;</text:p>
      <text:p text:style-name="P105"><text:s text:c="8"/>&lt;nav class="navbar navbar-expand-sm navbar-toggleable-sm navbar-dark bg-dark border-bottom box-shadow mb-3"&gt;</text:p>
      <text:p text:style-name="P106"><text:s text:c="12"/>&lt;div class="container-fluid"&gt;</text:p>
      <text:p text:style-name="P107"><text:s text:c="16"/>&lt;a class="navbar-brand fw-bold text-success" asp-area="" asp-controller="Home" asp-action="Index"&gt;🌐 Language Academy&lt;/a&gt;</text:p>
      <text:p text:style-name="P108"><text:s text:c="16"/>&lt;button class="navbar-toggler" type="button" data-bs-toggle="collapse" data-bs-target=".navbar-collapse"&gt;</text:p>
      <text:p text:style-name="P109"><text:s text:c="20"/>&lt;span class="navbar-toggler-icon"&gt;&lt;/span&gt;</text:p>
      <text:p text:style-name="P110"><text:s text:c="16"/>&lt;/button&gt;</text:p>
      <text:p text:style-name="P111"><text:s text:c="16"/>&lt;div class="navbar-collapse collapse d-sm-inline-flex justify-content-between"&gt;</text:p>
      <text:p text:style-name="P112"><text:s text:c="20"/>&lt;ul class="navbar-nav flex-grow-1"&gt;</text:p>
      <text:p text:style-name="P113"><text:s text:c="24"/>&lt;li class="nav-item"&gt;</text:p>
      <text:p text:style-name="P114"><text:s text:c="28"/>&lt;a class="nav-link text-white" asp-area="" asp-controller="Home" asp-action="Index"&gt;&lt;i class="bi bi-house-door"&gt;&lt;/i&gt; Home&lt;/a&gt;</text:p>
      <text:p text:style-name="P115"><text:s text:c="24"/>&lt;/li&gt;</text:p>
      <text:p text:style-name="P116"><text:s text:c="24"/>&lt;li class="nav-item"&gt;</text:p>
      <text:p text:style-name="P117"><text:s text:c="28"/>&lt;a class="nav-link text-white" asp-area="" asp-controller="Home" asp-action="Dashboard"&gt;&lt;i class="bi bi-speedometer2"&gt;&lt;/i&gt; Dashboard&lt;/a&gt;</text:p>
      <text:p text:style-name="P118"><text:s text:c="24"/>&lt;/li&gt;</text:p>
      <text:p text:style-name="P119"><text:s text:c="24"/>&lt;li class="nav-item"&gt;</text:p>
      <text:p text:style-name="P120"><text:s text:c="28"/>&lt;a class="nav-link text-white" asp-area="" asp-controller="Home" asp-action="Profile"&gt;&lt;i class="bi bi-person-circle"&gt;&lt;/i&gt; Profile&lt;/a&gt;</text:p>
      <text:p text:style-name="P121"><text:s text:c="24"/>&lt;/li&gt;</text:p>
      <text:p text:style-name="P122"><text:s text:c="20"/>&lt;/ul&gt;</text:p>
      <text:p text:style-name="P123"><text:s text:c="16"/>&lt;/div&gt;</text:p>
      <text:p text:style-name="P124"><text:s text:c="12"/>&lt;/div&gt;</text:p>
      <text:p text:style-name="P125"><text:s text:c="8"/>&lt;/nav&gt;</text:p>
      <text:p text:style-name="P126"><text:s text:c="4"/>&lt;/header&gt;</text:p>
      <text:p text:style-name="P127"><text:s text:c="4"/>&lt;div class="container"&gt;</text:p>
      <text:p text:style-name="P128"><text:s text:c="8"/>&lt;main role="main" class="pb-3"&gt;</text:p>
      <text:p text:style-name="P129"><text:s text:c="12"/>@RenderBody()</text:p>
      <text:p text:style-name="P130"><text:s text:c="8"/>&lt;/main&gt;</text:p>
      <text:p text:style-name="P131"><text:s text:c="4"/>&lt;/div&gt;</text:p>
      <text:p text:style-name="P132"><text:s/></text:p>
      <text:p text:style-name="ListParagraph"><text:span text:style-name="T133"><text:s text:c="4"/>&lt;script<text:s/></text:span><text:a xlink:href="mailto:src=" office:target-frame-name="_top" xlink:show="replace"><text:span text:style-name="T134">src="https://cdn.jsdelivr.net/npm/bootstrap@5.3.0/dist/js/bootstrap.bundle.min.js"&gt;&lt;/script</text:span></text:a><text:span text:style-name="T135">&gt;</text:span></text:p>
      <text:p text:style-name="P136"><text:s text:c="4"/>@await RenderSectionAsync("Scripts", required: false)</text:p>
      <text:p text:style-name="P137">&lt;/body&gt;</text:p>
      <text:p text:style-name="P138">&lt;/html&gt;</text:p>
      <text:p text:style-name="P139"/>
      <text:p text:style-name="P140"/>
      <text:list text:style-name="LFO2" text:continue-numbering="true">
        <text:list-item>
          <text:p text:style-name="P141">Controller code: (HomeController.cs)</text:p>
        </text:list-item>
      </text:list>
      <text:p text:style-name="P142"/>
      <text:p text:style-name="P143">using Microsoft.AspNetCore.Mvc;</text:p>
      <text:p text:style-name="P144"><text:s/></text:p>
      <text:p text:style-name="P145">namespace LanguageAcademy.Controllers</text:p>
      <text:p text:style-name="P146">{</text:p>
      <text:p text:style-name="P147"><text:s text:c="4"/>public class HomeController : Controller</text:p>
      <text:p text:style-name="P148"><text:s text:c="4"/>{</text:p>
      <text:p text:style-name="P149"><text:s text:c="8"/>public IActionResult Index()</text:p>
      <text:p text:style-name="P150"><text:s text:c="8"/>{</text:p>
      <text:p text:style-name="P151"><text:s text:c="12"/>return View();</text:p>
      <text:p text:style-name="P152"><text:s text:c="8"/>}</text:p>
      <text:p text:style-name="P153"><text:s/></text:p>
      <text:p text:style-name="P154"><text:s text:c="8"/>public IActionResult Dashboard()</text:p>
      <text:p text:style-name="P155"><text:s text:c="8"/>{</text:p>
      <text:p text:style-name="P156"><text:s text:c="12"/>return View();</text:p>
      <text:p text:style-name="P157"><text:s text:c="8"/>}</text:p>
      <text:p text:style-name="P158"><text:s/></text:p>
      <text:p text:style-name="P159"><text:s text:c="8"/>public IActionResult Profile()</text:p>
      <text:p text:style-name="P160"><text:s text:c="8"/>{</text:p>
      <text:p text:style-name="P161"><text:s text:c="12"/>return View();</text:p>
      <text:p text:style-name="P162"><text:s text:c="8"/>}</text:p>
      <text:p text:style-name="P163"><text:s text:c="4"/>}</text:p>
      <text:p text:style-name="P164">}</text:p>
      <text:p text:style-name="P165"/>
      <text:list text:style-name="LFO2" text:continue-numbering="true">
        <text:list-item>
          <text:p text:style-name="P166">The home code: (Index.cshtml)</text:p>
        </text:list-item>
      </text:list>
      <text:p text:style-name="P167"/>
      <text:p text:style-name="P168">@{</text:p>
      <text:p text:style-name="P169"><text:s text:c="4"/>ViewData["Title"] = "Home Page";</text:p>
      <text:p text:style-name="P170">}</text:p>
      <text:p text:style-name="P171"><text:s/></text:p>
      <text:p text:style-name="P172">&lt;div class="p-5 mb-4 bg-dark text-white rounded-3 shadow"&gt;</text:p>
      <text:p text:style-name="P173"><text:s text:c="4"/>&lt;div class="container-fluid py-5"&gt;</text:p>
      <text:p text:style-name="P174"><text:s text:c="8"/>&lt;h1 class="display-5 fw-bold"&gt;Welcome to Language Academy&lt;/h1&gt;</text:p>
      <text:p text:style-name="P175"><text:s text:c="8"/>&lt;p class="col-md-8 fs-4"&gt;Master English, Spanish, French, and Japanese with our premium, built-in tracking dashboard and interactive learning modules.&lt;/p&gt;</text:p>
      <text:p text:style-name="P176"><text:s text:c="8"/>&lt;a asp-action="Dashboard" class="btn btn-success btn-lg"&gt;View Analytics Dashboard&lt;/a&gt;</text:p>
      <text:p text:style-name="P177"><text:s text:c="4"/>&lt;/div&gt;</text:p>
      <text:p text:style-name="P178">&lt;/div&gt;</text:p>
      <text:p text:style-name="P179"><text:s/></text:p>
      <text:p text:style-name="P180">&lt;div class="row text-center mt-4"&gt;</text:p>
      <text:p text:style-name="P181"><text:s text:c="4"/>&lt;div class="col-md-4"&gt;</text:p>
      <text:p text:style-name="P182"><text:s text:c="8"/>&lt;div class="card p-3 shadow-sm"&gt;</text:p>
      <text:p text:style-name="P183"><text:s text:c="12"/>&lt;h3&gt;📚 12+ Courses&lt;/h3&gt;</text:p>
      <text:p text:style-name="P184"><text:s text:c="12"/>&lt;p&gt;From absolute beginner to conversational expert.&lt;/p&gt;</text:p>
      <text:p text:style-name="P185"><text:s text:c="8"/>&lt;/div&gt;</text:p>
      <text:p text:style-name="P186"><text:s text:c="4"/>&lt;/div&gt;</text:p>
      <text:p text:style-name="P187"><text:s text:c="4"/>&lt;div class="col-md-4"&gt;</text:p>
      <text:p text:style-name="P188"><text:s text:c="8"/>&lt;div class="card p-3 shadow-sm"&gt;</text:p>
      <text:p text:style-name="P189"><text:s text:c="12"/>&lt;h3&gt;👥 Live Tutors&lt;/h3&gt;</text:p>
      <text:p text:style-name="P190"><text:s text:c="12"/>&lt;p&gt;On-demand 1-on-1 virtual training sessions.&lt;/p&gt;</text:p>
      <text:p text:style-name="P191"><text:s text:c="8"/>&lt;/div&gt;</text:p>
      <text:p text:style-name="P192"><text:s text:c="4"/>&lt;/div&gt;</text:p>
      <text:p text:style-name="P193"><text:s text:c="4"/>&lt;div class="col-md-4"&gt;</text:p>
      <text:p text:style-name="P194"><text:s text:c="8"/>&lt;div class="card p-3 shadow-sm"&gt;</text:p>
      <text:p text:style-name="P195"><text:s text:c="12"/>&lt;h3&gt;⚡ Smart Metrics&lt;/h3&gt;</text:p>
      <text:p text:style-name="P196"><text:s text:c="12"/>&lt;p&gt;Track your vocabulary and grammar data instantly.&lt;/p&gt;</text:p>
      <text:p text:style-name="P197"><text:s text:c="8"/>&lt;/div&gt;</text:p>
      <text:p text:style-name="P198"><text:s text:c="4"/>&lt;/div&gt;</text:p>
      <text:p text:style-name="P199">&lt;/div&gt;</text:p>
      <text:p text:style-name="P200"/>
      <text:list text:style-name="LFO2" text:continue-numbering="true">
        <text:list-item>
          <text:p text:style-name="P201">The dashboard code: (Dashboard.cshtml)</text:p>
        </text:list-item>
      </text:list>
      <text:p text:style-name="P202"/>
      <text:p text:style-name="P203">@{</text:p>
      <text:p text:style-name="P204"><text:s text:c="4"/>ViewData["Title"] = "Dashboard";</text:p>
      <text:p text:style-name="P205">}</text:p>
      <text:p text:style-name="P206"><text:s/></text:p>
      <text:p text:style-name="P207">&lt;div class="container-fluid"&gt;</text:p>
      <text:p text:style-name="P208"><text:s text:c="4"/>&lt;h2 class="mb-4"&gt;Language Academy Overview&lt;/h2&gt;</text:p>
      <text:p text:style-name="P209"><text:s/></text:p>
      <text:p text:style-name="P210"><text:s text:c="4"/>&lt;div class="row mb-4"&gt;</text:p>
      <text:p text:style-name="P211"><text:s text:c="8"/>&lt;div class="col-md-3"&gt;</text:p>
      <text:p text:style-name="P212"><text:s text:c="12"/>&lt;div class="card bg-primary text-white p-3 shadow-sm"&gt;</text:p>
      <text:p text:style-name="P213"><text:s text:c="16"/>&lt;h6&gt;Total Active Students&lt;/h6&gt;</text:p>
      <text:p text:style-name="P214"><text:s text:c="16"/>&lt;h2&gt;1,248&lt;/h2&gt;</text:p>
      <text:p text:style-name="P215"><text:s text:c="12"/>&lt;/div&gt;</text:p>
      <text:p text:style-name="P216"><text:s text:c="8"/>&lt;/div&gt;</text:p>
      <text:p text:style-name="P217"><text:s text:c="8"/>&lt;div class="col-md-3"&gt;</text:p>
      <text:p text:style-name="P218"><text:s text:c="12"/>&lt;div class="card bg-success text-white p-3 shadow-sm"&gt;</text:p>
      <text:p text:style-name="P219"><text:s text:c="16"/>&lt;h6&gt;Active Course Programs&lt;/h6&gt;</text:p>
      <text:p text:style-name="P220"><text:s text:c="16"/>&lt;h2&gt;4 Main Languages&lt;/h2&gt;</text:p>
      <text:p text:style-name="P221"><text:s text:c="12"/>&lt;/div&gt;</text:p>
      <text:p text:style-name="P222"><text:s text:c="8"/>&lt;/div&gt;</text:p>
      <text:p text:style-name="P223"><text:s text:c="8"/>&lt;div class="col-md-3"&gt;</text:p>
      <text:p text:style-name="P224"><text:s text:c="12"/>&lt;div class="card bg-warning text-dark p-3 shadow-sm"&gt;</text:p>
      <text:p text:style-name="P225"><text:s text:c="16"/>&lt;h6&gt;Completion Rate&lt;/h6&gt;</text:p>
      <text:p text:style-name="P226"><text:s text:c="16"/>&lt;h2&gt;87.4%&lt;/h2&gt;</text:p>
      <text:p text:style-name="P227"><text:s text:c="12"/>&lt;/div&gt;</text:p>
      <text:p text:style-name="P228"><text:s text:c="8"/>&lt;/div&gt;</text:p>
      <text:p text:style-name="P229"><text:s text:c="8"/>&lt;div class="col-md-3"&gt;</text:p>
      <text:p text:style-name="P230"><text:s text:c="12"/>&lt;div class="card bg-info text-white p-3 shadow-sm"&gt;</text:p>
      <text:p text:style-name="P231"><text:s text:c="16"/>&lt;h6&gt;Monthly New Signups&lt;/h6&gt;</text:p>
      <text:p text:style-name="P232"><text:s text:c="16"/>&lt;h2&gt;+340&lt;/h2&gt;</text:p>
      <text:p text:style-name="P233"><text:s text:c="12"/>&lt;/div&gt;</text:p>
      <text:p text:style-name="P234"><text:s text:c="8"/>&lt;/div&gt;</text:p>
      <text:p text:style-name="P235"><text:s text:c="4"/>&lt;/div&gt;</text:p>
      <text:p text:style-name="P236"><text:s/></text:p>
      <text:p text:style-name="P237"><text:s text:c="4"/>&lt;div class="row"&gt;</text:p>
      <text:p text:style-name="P238"><text:s text:c="8"/>&lt;div class="col-md-6 mb-4"&gt;</text:p>
      <text:p text:style-name="P239"><text:s text:c="12"/>&lt;div class="card p-3 shadow-sm h-100"&gt;</text:p>
      <text:p text:style-name="P240"><text:s text:c="16"/>&lt;h5&gt;Student Breakdown per Language&lt;/h5&gt;</text:p>
      <text:p text:style-name="P241"><text:s text:c="16"/>&lt;div style="width: 100%; max-width: 400px; margin: auto;"&gt;</text:p>
      <text:p text:style-name="P242"><text:s text:c="20"/>&lt;canvas id="languageChart"&gt;&lt;/canvas&gt;</text:p>
      <text:p text:style-name="P243"><text:s text:c="16"/>&lt;/div&gt;</text:p>
      <text:p text:style-name="P244"><text:s text:c="12"/>&lt;/div&gt;</text:p>
      <text:p text:style-name="P245"><text:s text:c="8"/>&lt;/div&gt;</text:p>
      <text:p text:style-name="P246"><text:s/></text:p>
      <text:p text:style-name="P247"><text:s text:c="8"/>&lt;div class="col-md-6 mb-4"&gt;</text:p>
      <text:p text:style-name="P248"><text:s text:c="12"/>&lt;div class="card p-3 shadow-sm h-100"&gt;</text:p>
      <text:p text:style-name="P249"><text:s text:c="16"/>&lt;h5&gt;Top Performing Students&lt;/h5&gt;</text:p>
      <text:p text:style-name="P250"><text:s text:c="16"/>&lt;table class="table table-striped table-hover mt-2"&gt;</text:p>
      <text:p text:style-name="P251"><text:s text:c="20"/>&lt;thead&gt;</text:p>
      <text:p text:style-name="P252"><text:s text:c="24"/>&lt;tr&gt;</text:p>
      <text:p text:style-name="P253"><text:s text:c="28"/>&lt;th&gt;Student Name&lt;/th&gt;</text:p>
      <text:p text:style-name="P254"><text:s text:c="28"/>&lt;th&gt;Enrolled Language&lt;/th&gt;</text:p>
      <text:p text:style-name="P255"><text:s text:c="28"/>&lt;th&gt;Progress Score&lt;/th&gt;</text:p>
      <text:p text:style-name="P256"><text:s text:c="24"/>&lt;/tr&gt;</text:p>
      <text:p text:style-name="P257"><text:s text:c="20"/>&lt;/thead&gt;</text:p>
      <text:p text:style-name="P258"><text:s text:c="20"/>&lt;tbody&gt;</text:p>
      <text:p text:style-name="P259"><text:s text:c="24"/>&lt;tr&gt;</text:p>
      <text:p text:style-name="P260"><text:s text:c="28"/>&lt;td&gt;John Doe&lt;/td&gt;</text:p>
      <text:p text:style-name="P261"><text:s text:c="28"/>&lt;td&gt;Spanish Level B1&lt;/td&gt;</text:p>
      <text:p text:style-name="P262"><text:s text:c="28"/>&lt;td&gt;&lt;span class="badge bg-success"&gt;95%&lt;/span&gt;&lt;/td&gt;</text:p>
      <text:p text:style-name="P263"><text:s text:c="24"/>&lt;/tr&gt;</text:p>
      <text:p text:style-name="P264"><text:s text:c="24"/>&lt;tr&gt;</text:p>
      <text:p text:style-name="P265"><text:s text:c="28"/>&lt;td&gt;Jane Smith&lt;/td&gt;</text:p>
      <text:p text:style-name="P266"><text:s text:c="28"/>&lt;td&gt;English C1 Advanced&lt;/td&gt;</text:p>
      <text:p text:style-name="P267"><text:s text:c="28"/>&lt;td&gt;&lt;span class="badge bg-success"&gt;91%&lt;/span&gt;&lt;/td&gt;</text:p>
      <text:p text:style-name="P268"><text:s text:c="24"/>&lt;/tr&gt;</text:p>
      <text:p text:style-name="P269"><text:s text:c="24"/>&lt;tr&gt;</text:p>
      <text:p text:style-name="P270"><text:s text:c="28"/>&lt;td&gt;Carlos Mendez&lt;/td&gt;</text:p>
      <text:p text:style-name="P271"><text:s text:c="28"/>&lt;td&gt;French A2&lt;/td&gt;</text:p>
      <text:p text:style-name="P272"><text:s text:c="28"/>&lt;td&gt;&lt;span class="badge bg-warning text-dark"&gt;78%&lt;/span&gt;&lt;/td&gt;</text:p>
      <text:p text:style-name="P273"><text:s text:c="24"/>&lt;/tr&gt;</text:p>
      <text:p text:style-name="P274"><text:s text:c="24"/>&lt;tr&gt;</text:p>
      <text:p text:style-name="P275"><text:s text:c="28"/>&lt;td&gt;Yuki Tanaka&lt;/td&gt;</text:p>
      <text:p text:style-name="P276"><text:s text:c="28"/>&lt;td&gt;Japanese N4&lt;/td&gt;</text:p>
      <text:p text:style-name="P277"><text:s text:c="28"/>&lt;td&gt;&lt;span class="badge bg-success"&gt;88%&lt;/span&gt;&lt;/td&gt;</text:p>
      <text:p text:style-name="P278"><text:s text:c="24"/>&lt;/tr&gt;</text:p>
      <text:p text:style-name="P279"><text:s text:c="20"/>&lt;/tbody&gt;</text:p>
      <text:p text:style-name="P280"><text:s text:c="16"/>&lt;/table&gt;</text:p>
      <text:p text:style-name="P281"><text:s text:c="12"/>&lt;/div&gt;</text:p>
      <text:p text:style-name="P282"><text:s text:c="8"/>&lt;/div&gt;</text:p>
      <text:p text:style-name="P283"><text:s text:c="4"/>&lt;/div&gt;</text:p>
      <text:p text:style-name="P284">&lt;/div&gt;</text:p>
      <text:p text:style-name="P285"><text:s/></text:p>
      <text:p text:style-name="P286">@section Scripts {</text:p>
      <text:p text:style-name="P287"><text:s text:c="4"/>&lt;script src="https://cdn.jsdelivr.net/npm/chart.js"&gt;&lt;/script&gt;</text:p>
      <text:p text:style-name="P288"><text:s text:c="4"/>&lt;script&gt;</text:p>
      <text:p text:style-name="P289"><text:s text:c="8"/>const ctx = document.getElementById('languageChart').getContext('2d');</text:p>
      <text:p text:style-name="P290"><text:s text:c="8"/>new Chart(ctx, {</text:p>
      <text:p text:style-name="P291"><text:s text:c="12"/>type: 'pie',</text:p>
      <text:p text:style-name="P292"><text:s text:c="12"/>data: {</text:p>
      <text:p text:style-name="P293"><text:s text:c="16"/>labels: ['English', 'Spanish', 'French', 'Japanese'],</text:p>
      <text:p text:style-name="P294"><text:s text:c="16"/>datasets: [{</text:p>
      <text:p text:style-name="P295"><text:s text:c="20"/>data: [520, 340, 210, 178],</text:p>
      <text:p text:style-name="P296"><text:s text:c="20"/>backgroundColor: ['#0d6efd', '#198754', '#ffc107', '#0dcaf0']</text:p>
      <text:p text:style-name="P297"><text:s text:c="16"/>}]</text:p>
      <text:p text:style-name="P298"><text:s text:c="12"/>}</text:p>
      <text:p text:style-name="P299"><text:s text:c="8"/>});</text:p>
      <text:p text:style-name="P300"><text:s text:c="4"/>&lt;/script&gt;</text:p>
      <text:p text:style-name="P301">}</text:p>
      <text:p text:style-name="P302"/>
      <text:list text:style-name="LFO2" text:continue-numbering="true">
        <text:list-item>
          <text:p text:style-name="P303">The profile code: (Profile.cshtml)</text:p>
        </text:list-item>
      </text:list>
      <text:p text:style-name="P304"/>
      <text:p text:style-name="P305">@{</text:p>
      <text:p text:style-name="P306"><text:s text:c="4"/>ViewData["Title"] = "User Profile";</text:p>
      <text:p text:style-name="P307">}</text:p>
      <text:p text:style-name="P308"><text:s/></text:p>
      <text:p text:style-name="P309">&lt;div class="row justify-content-center"&gt;</text:p>
      <text:p text:style-name="P310"><text:s text:c="4"/>&lt;div class="col-md-6"&gt;</text:p>
      <text:p text:style-name="P311"><text:s text:c="8"/>&lt;div class="card shadow p-4 text-center"&gt;</text:p>
      <text:p text:style-name="P312"><text:s text:c="12"/>&lt;div class="mb-3"&gt;</text:p>
      <text:p text:style-name="P313"><text:s text:c="16"/>&lt;div class="bg-secondary text-white rounded-circle d-inline-flex align-items-center justify-content-center" style="width: 100px; height: 100px; font-size: 40px;"&gt;</text:p>
      <text:p text:style-name="P314"><text:s text:c="20"/>LA</text:p>
      <text:p text:style-name="P315"><text:s text:c="16"/>&lt;/div&gt;</text:p>
      <text:p text:style-name="P316"><text:s text:c="12"/>&lt;/div&gt;</text:p>
      <text:p text:style-name="P317"><text:s text:c="12"/>&lt;h3&gt;Administrator Account&lt;/h3&gt;</text:p>
      <text:p text:style-name="P318"><text:s text:c="12"/>&lt;p class="text-muted"&gt;Role: Head Registrar&lt;/p&gt;</text:p>
      <text:p text:style-name="P319"><text:s text:c="12"/>&lt;hr /&gt;</text:p>
      <text:p text:style-name="P320"><text:s text:c="12"/>&lt;div class="text-start"&gt;</text:p>
      <text:p text:style-name="Normal"><text:span text:style-name="T321"><text:s text:c="16"/>&lt;p&gt;&lt;strong&gt;Email:&lt;/strong&gt;<text:s/></text:span><text:a xlink:href="mailto:admin@languageacademy.com%3c/p" office:target-frame-name="_top" xlink:show="replace"><text:span text:style-name="T322">admin@languageacademy.com&lt;/p</text:span></text:a><text:span text:style-name="T323">&gt;</text:span></text:p>
      <text:p text:style-name="P324"><text:s text:c="16"/>&lt;p&gt;&lt;strong&gt;Assigned Campus:&lt;/strong&gt; Virtual Portal Alpha&lt;/p&gt;</text:p>
      <text:p text:style-name="P325"><text:s text:c="16"/>&lt;p&gt;&lt;strong&gt;System Status:&lt;/strong&gt; Operational&lt;/p&gt;</text:p>
      <text:p text:style-name="P326"><text:s text:c="12"/>&lt;/div&gt;</text:p>
      <text:p text:style-name="P327"><text:s text:c="12"/>&lt;button class="btn btn-outline-dark btn-sm mt-3"&gt;Edit Profile Settings&lt;/button&gt;</text:p>
      <text:p text:style-name="P328"><text:s text:c="8"/>&lt;/div&gt;</text:p>
      <text:p text:style-name="P329"><text:s text:c="4"/>&lt;/div&gt;</text:p>
      <text:p text:style-name="P330">&lt;/div&gt;</text:p>
      <text:p text:style-name="P331"/>
      <text:p text:style-name="P332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na Loutfi Čučaković</meta:initial-creator>
    <dc:creator>Diana Loutfi Čučaković</dc:creator>
    <meta:creation-date>2026-06-18T01:02:00Z</meta:creation-date>
    <dc:date>2026-06-18T01:02:00Z</dc:date>
    <meta:template xlink:href="Normal.dotm" xlink:type="simple"/>
    <meta:editing-cycles>1</meta:editing-cycles>
    <meta:editing-duration>PT0S</meta:editing-duration>
    <meta:document-statistic meta:page-count="1" meta:paragraph-count="25" meta:word-count="1891" meta:character-count="12645" meta:row-count="89" meta:non-whitespace-character-count="10779"/>
  </office:meta>
</office:document-meta>
</file>